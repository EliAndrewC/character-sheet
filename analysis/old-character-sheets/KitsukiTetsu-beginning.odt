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Times New Roman1" svg:font-family="'Times New Roman'" style:font-family-generic="system" style:font-pitch="variable"/>
  </office:font-face-decls>
  <office:automatic-styles>
    <style:style style:name="P1" style:family="paragraph" style:parent-style-name="Standard">
      <style:paragraph-properties fo:margin-top="0.0835in" fo:margin-bottom="0in" loext:contextual-spacing="false" fo:line-height="100%" fo:break-before="auto" fo:break-after="auto"/>
      <style:text-properties style:font-name="Times New Roman" style:font-name-asian="Times New Roman1" style:font-name-complex="Times New Roman1"/>
    </style:style>
    <style:style style:name="P2" style:family="paragraph" style:parent-style-name="Standard">
      <style:paragraph-properties fo:margin-top="0.0835in" fo:margin-bottom="0in" loext:contextual-spacing="false" fo:line-height="100%" fo:break-before="auto" fo:break-after="auto"/>
    </style:style>
    <style:style style:name="P3" style:family="paragraph" style:parent-style-name="Standard" style:master-page-name="Standard">
      <style:paragraph-properties fo:margin-top="0.0835in" fo:margin-bottom="0in" loext:contextual-spacing="false" fo:line-height="100%" style:page-number="1" fo:break-before="auto" fo:break-after="auto"/>
      <style:text-properties style:font-name="Times New Roman" style:font-name-asian="Times New Roman1" style:font-name-complex="Times New Roman1"/>
    </style:style>
    <style:style style:name="P4" style:family="paragraph" style:parent-style-name="Standard">
      <style:paragraph-properties fo:margin-left="0in" fo:margin-right="0in" fo:margin-top="0.0835in" fo:margin-bottom="0in" loext:contextual-spacing="false" fo:line-height="100%" fo:text-indent="0in" style:auto-text-indent="false" fo:break-before="auto" fo:break-after="auto"/>
    </style:style>
    <style:style style:name="P5" style:family="paragraph" style:parent-style-name="Standard">
      <style:paragraph-properties fo:margin-left="0in" fo:margin-right="0in" fo:line-height="100%" fo:text-align="justify" style:justify-single-word="false" fo:text-indent="0in" style:auto-text-indent="false" fo:break-before="auto" fo:break-after="auto"/>
    </style:style>
    <style:style style:name="P6" style:family="paragraph" style:parent-style-name="Standard">
      <style:paragraph-properties fo:line-height="100%" fo:break-before="auto" fo:break-after="auto"/>
    </style:style>
    <style:style style:name="P7" style:family="paragraph" style:parent-style-name="Standard">
      <style:paragraph-properties fo:line-height="100%" fo:text-align="justify" style:justify-single-word="false" fo:break-before="auto" fo:break-after="auto"/>
    </style:style>
    <style:style style:name="P8" style:family="paragraph" style:parent-style-name="Standard">
      <style:paragraph-properties fo:line-height="100%" fo:text-align="justify" style:justify-single-word="false" fo:break-before="auto" fo:break-after="auto"/>
      <style:text-properties style:font-name="Times New Roman" style:font-name-asian="Times New Roman1" style:font-name-complex="Times New Roman1"/>
    </style:style>
    <style:style style:name="P9" style:family="paragraph" style:parent-style-name="Standard">
      <style:paragraph-properties fo:line-height="100%" fo:text-align="justify" style:justify-single-word="false" fo:break-before="auto" fo:break-after="auto"/>
      <style:text-properties style:font-name="Times New Roman" fo:font-weight="bold" style:font-name-asian="Times New Roman1" style:font-weight-asian="bold" style:font-name-complex="Times New Roman1" style:font-weight-complex="bold"/>
    </style:style>
    <style:style style:name="P10" style:family="paragraph" style:parent-style-name="Standard">
      <style:paragraph-properties fo:margin-top="0.1665in" fo:margin-bottom="0.1665in" loext:contextual-spacing="false" fo:line-height="100%" fo:text-align="justify" style:justify-single-word="false" fo:break-before="auto" fo:break-after="auto"/>
    </style:style>
    <style:style style:name="P11" style:family="paragraph" style:parent-style-name="Heading_20_3">
      <style:paragraph-properties fo:margin-top="0.1945in" fo:margin-bottom="0.0555in" loext:contextual-spacing="false" fo:line-height="100%" fo:text-align="justify" style:justify-single-word="false" fo:keep-together="auto" fo:break-before="auto" fo:break-after="auto" fo:keep-with-next="auto"/>
    </style:style>
    <style:style style:name="P12" style:family="paragraph">
      <loext:graphic-properties draw:fill="solid" draw:fill-color="#a0a0a0"/>
      <style:paragraph-properties fo:text-align="center"/>
    </style:style>
    <style:style style:name="T1" style:family="text">
      <style:text-properties style:font-name="Times New Roman" style:font-name-asian="Times New Roman1" style:font-name-complex="Times New Roman1"/>
    </style:style>
    <style:style style:name="T2" style:family="text">
      <style:text-properties style:font-name="Times New Roman" style:font-name-asian="Times New Roman1" style:font-name-complex="Times New Roman1" fo:background-color="#ffffff"/>
    </style:style>
    <style:style style:name="T3" style:family="text">
      <style:text-properties style:font-name="Times New Roman" style:font-name-asian="Times New Roman1" style:font-name-complex="Times New Roman1" fo:background-color="#00ffff"/>
    </style:style>
    <style:style style:name="T4" style:family="text">
      <style:text-properties style:font-name="Times New Roman" fo:background-color="#e6b8af" loext:char-shading-value="0" style:font-name-asian="Times New Roman1" style:font-name-complex="Times New Roman1"/>
    </style:style>
    <style:style style:name="T5" style:family="text">
      <style:text-properties style:font-name="Times New Roman" fo:background-color="#d9ead3" loext:char-shading-value="0" style:font-name-asian="Times New Roman1" style:font-name-complex="Times New Roman1"/>
    </style:style>
    <style:style style:name="T6" style:family="text">
      <style:text-properties style:font-name="Times New Roman" fo:background-color="#b7b7b7" loext:char-shading-value="0" style:font-name-asian="Times New Roman1" style:font-name-complex="Times New Roman1"/>
    </style:style>
    <style:style style:name="T7" style:family="text">
      <style:text-properties style:font-name="Times New Roman" fo:background-color="#ead1dc" loext:char-shading-value="0" style:font-name-asian="Times New Roman1" style:font-name-complex="Times New Roman1"/>
    </style:style>
    <style:style style:name="T8" style:family="text">
      <style:text-properties style:font-name="Times New Roman" fo:font-style="italic" style:text-underline-style="solid" style:text-underline-width="auto" style:text-underline-color="font-color" style:font-name-asian="Times New Roman1" style:font-style-asian="italic" style:font-name-complex="Times New Roman1" style:font-style-complex="italic"/>
    </style:style>
    <style:style style:name="T9" style:family="text">
      <style:text-properties style:font-name="Times New Roman" fo:background-color="#d0e0e3" loext:char-shading-value="0" style:font-name-asian="Times New Roman1" style:font-name-complex="Times New Roman1"/>
    </style:style>
    <style:style style:name="T10" style:family="text">
      <style:text-properties style:font-name="Times New Roman" fo:font-weight="bold" style:font-name-asian="Times New Roman1" style:font-weight-asian="bold" style:font-name-complex="Times New Roman1" style:font-weight-complex="bold"/>
    </style:style>
    <style:style style:name="T11" style:family="text">
      <style:text-properties style:font-name="Times New Roman" fo:font-weight="bold" fo:background-color="#ead1dc" loext:char-shading-value="0" style:font-name-asian="Times New Roman1" style:font-weight-asian="bold" style:font-name-complex="Times New Roman1" style:font-weight-complex="bold"/>
    </style:style>
    <style:style style:name="T12" style:family="text">
      <style:text-properties fo:background-color="#d0e0e3" loext:char-shading-value="0"/>
    </style:style>
    <style:style style:name="T13" style:family="text">
      <style:text-properties fo:background-color="#e6b8af" loext:char-shading-value="0"/>
    </style:style>
    <style:style style:name="T14" style:family="text">
      <style:text-properties fo:background-color="#ffffff"/>
    </style:style>
    <style:style style:name="T15" style:family="text">
      <style:text-properties fo:color="#000000" style:font-name="Times New Roman" fo:font-size="11pt" fo:font-weight="bold" style:font-name-asian="Times New Roman1" style:font-size-asian="11pt" style:font-weight-asian="bold" style:font-name-complex="Times New Roman1" style:font-size-complex="11pt" style:font-weight-complex="bol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text:span text:style-name="T1"><text:tab/><text:tab/><text:tab/><text:tab/><text:tab/><text:tab/><text:tab/>EX: Spent 299/300 xp total <text:s text:c="3"/>(150 xp Earned)</text:span></text:p>
      <text:p text:style-name="P2"><text:span text:style-name="T1">Fire:<text:tab/>3<text:tab/><text:tab/><text:tab/><text:tab/><text:tab/><text:tab/>Honor<text:tab/><text:tab/>5 +.5*1k1 - 5</text:span></text:p>
      <text:p text:style-name="P4"><text:span text:style-name="T1">Water:<text:tab/>5<text:tab/><text:tab/><text:tab/><text:tab/><text:tab/><text:tab/>Recognition 7 +1 to rec. +2 non-Moto</text:span></text:p>
      <text:p text:style-name="P2"><text:span text:style-name="T1">Air:<text:tab/>3<text:tab/><text:tab/><text:tab/><text:tab/><text:tab/><text:tab/>Rank<text:tab/>7 +2 if rec. and +2 Moto and +3 non-Moto</text:span></text:p>
      <text:p text:style-name="P2"><text:span text:style-name="T1">Earth:<text:tab/>3<text:tab/><text:tab/><text:tab/><text:tab/><text:tab/><text:tab/>Wound Check: </text:span><text:span text:style-name="T4">+1k0</text:span><text:span text:style-name="T2"> <text:s/></text:span><text:span text:style-name="T12">3Dan</text:span></text:p>
      <text:p text:style-name="P2"><text:span text:style-name="T1">Void: <text:tab/>3<text:tab/><text:tab/><text:tab/><text:tab/><text:tab/><text:tab/></text:span></text:p>
      <text:p text:style-name="P2"><text:span text:style-name="T1"><text:tab/><text:tab/><text:tab/><text:tab/><text:tab/><text:tab/><text:tab/>Light wounds:<text:tab/><text:tab/>0</text:span></text:p>
      <text:p text:style-name="P2"><text:span text:style-name="T1"><text:tab/><text:tab/><text:tab/><text:tab/><text:tab/><text:tab/><text:tab/>Serious wounds:<text:tab/>0</text:span></text:p>
      <text:p text:style-name="P5"><text:span text:style-name="T1">Discern Honor<text:tab/>5<text:tab/>+ 0.5 * (1k1 – 0.5)</text:span></text:p>
      <text:p text:style-name="P5"><text:span text:style-name="T1">Iaijutsu<text:tab/><text:tab/>5<text:tab/><text:tab/><text:tab/><text:tab/><text:tab/>Attack:<text:tab/>3 </text:span><text:span text:style-name="T12">3Dan</text:span></text:p>
      <text:p text:style-name="P5"><text:span text:style-name="T5">Presence<text:tab/></text:span><text:span text:style-name="T2">5<text:tab/></text:span><text:span text:style-name="T1"><text:tab/><text:tab/><text:tab/><text:tab/>Parry:<text:tab/>4</text:span></text:p>
      <text:p text:style-name="P2"><text:span text:style-name="T5">(Once per convo roll this knack instead of any skill for a contested roll initiated by diff character.)</text:span></text:p>
      <text:p text:style-name="P2"><draw:rect text:anchor-type="as-char" style:rel-width="100%" draw:z-index="0" draw:style-name="gr1" draw:text-style-name="P12" svg:width="0.0012in" svg:height="0.0213in"><text:p/></draw:rect></text:p>
      <text:p text:style-name="P1"/>
      <text:p text:style-name="P2"><text:span text:style-name="T6">Acting<text:tab/></text:span><text:span text:style-name="T2">0 </text:span><text:span text:style-name="T1">(sincerity, intimidation, and sneaking)<text:tab/><text:tab/><text:tab/></text:span><text:span text:style-name="T3">Commerce</text:span><text:span text:style-name="T2"> 1</text:span></text:p>
      <text:p text:style-name="P6"><text:tab/><text:tab/><text:tab/></text:p>
      <text:p text:style-name="P2"><text:span text:style-name="T3">Interrogation</text:span> <text:s/>5 +<text:span text:style-name="T13">1k0</text:span><text:tab/>/ +10<text:tab/><text:span text:style-name="T12">3Dan</text:span><text:tab/><text:tab/><text:tab/><text:tab/><text:span text:style-name="T3">History</text:span><text:span text:style-name="T2"> 1 </text:span><text:span text:style-name="T1">(raise on culture, law, strategy </text:span><text:span text:style-name="T7">&amp; heraldry up to 25</text:span><text:span text:style-name="T1">)</text:span></text:p>
      <text:p text:style-name="P6"><text:tab/><text:tab/></text:p>
      <text:p text:style-name="P2"><text:span text:style-name="T6">Manipulation</text:span><text:span text:style-name="T14"> 0<text:tab/><text:tab/></text:span><text:tab/><text:tab/><text:tab/><text:tab/><text:tab/><text:span text:style-name="T3">Underworld</text:span><text:span text:style-name="T2"> 1 </text:span><text:span text:style-name="T12">3Dan</text:span></text:p>
      <text:p text:style-name="P6"/>
      <text:p text:style-name="P6"><draw:rect text:anchor-type="as-char" style:rel-width="100%" draw:z-index="1" draw:style-name="gr1" draw:text-style-name="P12" svg:width="0.0012in" svg:height="0.0213in"><text:p/></draw:rect></text:p>
      <text:p text:style-name="P6"><text:tab/><text:tab/><text:tab/></text:p>
      <text:p text:style-name="P2"><text:span text:style-name="T6">Bragging</text:span><text:span text:style-name="T1"> 1 (H+Rec.+x2 diff to higher) +5 &amp; +20 to non-moto<text:tab/></text:span><text:span text:style-name="T3">Culture</text:span><text:span text:style-name="T2"> 2 </text:span><text:span text:style-name="T7">-</text:span><text:span text:style-name="T2">10 + 5</text:span></text:p>
      <text:p text:style-name="P6"><text:tab/><text:tab/><text:tab/></text:p>
      <text:p text:style-name="P2"><text:soft-page-break/><text:span text:style-name="T6">Etiquette</text:span><text:span text:style-name="T2"> 2<text:tab/></text:span><text:span text:style-name="T1"><text:tab/><text:tab/><text:tab/><text:tab/><text:tab/><text:tab/></text:span><text:span text:style-name="T3">Heraldry</text:span><text:span text:style-name="T2"> 0 +20 and +5 up to 25</text:span></text:p>
      <text:p text:style-name="P6"><text:tab/><text:tab/><text:tab/></text:p>
      <text:p text:style-name="P2"><text:span text:style-name="T6">Intimidation</text:span><text:span text:style-name="T2"> 1 +5 &amp; +20 </text:span><text:span text:style-name="T1">to non-moto<text:tab/></text:span><text:span text:style-name="T9">3Dan</text:span><text:span text:style-name="T1"><text:tab/><text:tab/><text:tab/></text:span><text:span text:style-name="T3">Investigation</text:span><text:span text:style-name="T1"> 3 <text:s/></text:span><text:span text:style-name="T4">+1k0</text:span><text:span text:style-name="T2"> + 10</text:span></text:p>
      <text:p text:style-name="P6"><text:tab/><text:tab/><text:tab/></text:p>
      <text:p text:style-name="P2"><text:span text:style-name="T6">Sincerity</text:span><text:span text:style-name="T2"> 3 +20 on open if peasant<text:tab/><text:tab/><text:tab/><text:tab/></text:span><text:span text:style-name="T3">Law</text:span><text:span text:style-name="T2"> 3 + 5 </text:span><text:span text:style-name="T12">3Dan</text:span></text:p>
      <text:p text:style-name="P6"><text:tab/><text:tab/><text:tab/></text:p>
      <text:p text:style-name="P2"><text:span text:style-name="T6">Sneaking</text:span><text:span text:style-name="T2"> 0<text:tab/></text:span><text:span text:style-name="T1"><text:tab/><text:tab/><text:tab/><text:tab/><text:tab/><text:tab/></text:span><text:span text:style-name="T3">Precepts</text:span><text:span text:style-name="T2"> 3 + 10 </text:span><text:span text:style-name="T1">to non-moto</text:span></text:p>
      <text:p text:style-name="P6"><text:tab/><text:tab/><text:tab/></text:p>
      <text:p text:style-name="P2"><text:span text:style-name="T6">Tact</text:span><text:span text:style-name="T2"> 3 +20 on open if peasant<text:tab/></text:span><text:span text:style-name="T1"><text:tab/><text:tab/><text:tab/><text:tab/></text:span><text:span text:style-name="T3">Strategy</text:span><text:span text:style-name="T2"> 1 + 5 and + 10 </text:span><text:span text:style-name="T1">to non-moto</text:span></text:p>
      <text:p text:style-name="P1"/>
      <text:p text:style-name="P1"/>
      <text:p text:style-name="P2"><draw:rect text:anchor-type="as-char" style:rel-width="100%" draw:z-index="2" draw:style-name="gr1" draw:text-style-name="P12" svg:width="0.0012in" svg:height="0.0213in"><text:p/></draw:rect></text:p>
      <text:p text:style-name="P1"/>
      <text:p text:style-name="P2"><text:span text:style-name="T1">Kitsuki Magistrate School</text:span></text:p>
      <text:p text:style-name="P1"/>
      <text:p text:style-name="P2"><text:span text:style-name="T1">School Ring:</text:span></text:p>
      <text:p text:style-name="P2"><text:span text:style-name="T1">Water</text:span></text:p>
      <text:p text:style-name="P1"/>
      <text:p text:style-name="P2"><text:span text:style-name="T1">School Knacks:</text:span></text:p>
      <text:p text:style-name="P2"><text:span text:style-name="T1">Discern Honor (When you use this knack the GM tells you that that character's honor + 0.5 * (1k1 – 0.5). After each conversation past the first, you get a more accurate idea of their honor, and the GM tells you a number which is 0.X closer to the truth, where X is your rank in this knack.)</text:span></text:p>
      <text:p text:style-name="P1"/>
      <text:p text:style-name="P2"><text:span text:style-name="T1"><text:s/>Iaijutsu </text:span></text:p>
      <text:p text:style-name="P1"/>
      <text:p text:style-name="P2"><text:span text:style-name="T1">Presence (Once per conversation, you may use your practiced presence of authority to roll this knack instead of any skill when making a contested roll initiated by another character.)</text:span></text:p>
      <text:p text:style-name="P1"/>
      <text:p text:style-name="P2"><text:span text:style-name="T1">Special Ability:</text:span></text:p>
      <text:p text:style-name="P2"><text:soft-page-break/><text:span text:style-name="T1">You use Water for interrogation rolls, and you add twice your Water to all attack rolls.</text:span></text:p>
      <text:p text:style-name="P1"/>
      <text:p text:style-name="P2"><text:span text:style-name="T1">First Dan:</text:span></text:p>
      <text:p text:style-name="P2"><text:span text:style-name="T4">Roll one extra die on investigation, interrogation, and wound check rolls.</text:span></text:p>
      <text:p text:style-name="P2"><text:span text:style-name="T1">Second Dan:</text:span></text:p>
      <text:p text:style-name="P2"><text:span text:style-name="T1">You get a free raise on interrogation rolls.</text:span></text:p>
      <text:p text:style-name="P2"><text:span text:style-name="T9">Third Dan:</text:span></text:p>
      <text:p text:style-name="P2"><text:span text:style-name="T9">Each adventure you get 2X free raises, where X is equal to your investigation skill, which may be applied to the following rolls: interrogation, intimidation, law, underworld, attack, and wound checks. <text:s/>You may not spend more than X of these free raises on any single roll.</text:span></text:p>
      <text:p text:style-name="P2"><text:span text:style-name="T1">Fourth Dan:</text:span></text:p>
      <text:p text:style-name="P2"><text:span text:style-name="T1">Raise your current and maximum Water by 1. <text:s/>Raising your Water now costs 5 fewer XP.</text:span></text:p>
      <text:p text:style-name="P2"><text:span text:style-name="T1">You automatically know the Void, parry, and phase of the next action of each character during combat, and you know the result of contested rolls made against you out of combat.</text:span></text:p>
      <text:p text:style-name="P2"><text:span text:style-name="T1">Fifth Dan:</text:span></text:p>
      <text:p text:style-name="P2"><text:span text:style-name="T1">Your presence is so overwhelming that the Air, Fire and Water rings of chosen characters are reduced by one. <text:s/>You may do this to any one character, or you may do it to multiple characters so long as the sum of their experience does not exceed your experience. <text:s/>This does not work during the iaijutsu phase of a duel, and it does not stack with other Kitsuki Magistrates targeting the same character.</text:span></text:p>
      <text:p text:style-name="P1"/>
      <text:p text:style-name="P1"/>
      <text:p text:style-name="P1"/>
      <text:p text:style-name="P1"/>
      <text:p text:style-name="P7"><text:span text:style-name="T10">Good Reputation</text:span><text:span text:style-name="T1"> (3): Your Recognition is considered 1.0 higher for the purposes of being recognized, and your Rank is considered to be 2.0 higher when dealing with anyone who knows your reputation.</text:span></text:p>
      <text:p text:style-name="P8"/>
      <text:p text:style-name="P7"><text:span text:style-name="T10">Kind Eye </text:span><text:span text:style-name="T1">(3): You get 4 free raises on tact and open sincerity rolls when talking to peasant characters such as servants who are often treated badly by samurai.</text:span></text:p>
      <text:p text:style-name="P8"/>
      <text:p text:style-name="P7"><text:span text:style-name="T10">Discerning</text:span><text:span text:style-name="T1"> (5): You get free raise on interrogation rolls and 2 free raises on investigation rolls.</text:span></text:p>
      <text:p text:style-name="P9"/>
      <text:p text:style-name="P7"><text:span text:style-name="T10">Fierce</text:span><text:span text:style-name="T1"> (2): You get a free raise on bragging and intimidation rolls.</text:span></text:p>
      <text:p text:style-name="P11"><text:bookmark text:name="_2ia6ig9audup"/><text:span text:style-name="T15">Famous Sword [Advantage: 5 XP]</text:span></text:p>
      <text:p text:style-name="P10"><text:span text:style-name="T1">The greatest swords cannot be bought… but you spent years saving your accumulating wealth and looking out for families who would be so grateful for your financial gifts that they would be willing to give you one of their great family swords in return. As a result, you have acquired an especially renown sword whose name is even more famous than your own.</text:span></text:p>
      <text:p text:style-name="P10"><text:soft-page-break/><text:span text:style-name="T1">While your sword will have some relatively small extra abilities (determined by the GM after you take this advantage), the main benefit is how much glory you bring yourself by wielding it. In the eyes of all non-Moto samurai, you are considered to have 2.0 higher Rank and Recognition, 4 free raises on bragging and intimidation rolls, and 2 free raises on precepts and strategy rolls.</text:span></text:p>
      <text:p text:style-name="P11"><text:bookmark text:name="_qytc8fxmqktf"/><text:span text:style-name="T15">Equestrian [Advantage: 3 XP]</text:span></text:p>
      <text:p text:style-name="P10"><text:span text:style-name="T1">The Hidden Way is headquartered in Unicorn lands, where horses are valued almost as much as swords. While most of the rest of the empire rides smaller ponies of no note, the Shinjo and Otaku samurai can trace the pedigree of their horses back all the way to the Ancestral Progenitors (the best horses of Shinjo and her personal vassals). Such horses are tested in competition to determine the strongest and fastest, with the best of these fetching hundreds of koku.</text:span></text:p>
      <text:p text:style-name="P10"><text:span text:style-name="T1">You’ve spent years accumulating a personal stable containing dozens of the finest horses, especially Shinjo riding steeds and Otaku battle horses (the Otaku ones are all geldings, since the Otaku strictly forbid the trading of breeding horses). Your collection is known far and wide as rivaling even the personal stables of Unicorn daimyo, and horse traders and breeders travel to Outsider Keep from all over Unicorn lands to make deals and arrangements with you.</text:span></text:p>
      <text:p text:style-name="P10"><text:span text:style-name="T1">Your Rank is considered 2.0 higher to all members of the Unicorn clan (including Moto) and 1.0 higher for all other samurai. You get 4 free raises on Bragging rolls and Heraldry rolls for non-Moto and 2 free raises on precepts and strategy rolls..</text:span></text:p>
      <text:p text:style-name="P8"/>
      <text:p text:style-name="P1"/>
      <text:p text:style-name="P7"><text:span text:style-name="T10">Long Temper</text:span><text:span text:style-name="T1"> (5): You hold grudges over perceived insults, especially over matters of honor. Although you need not react immediately, you will not forget the insult and will burn with the need to extract payback.</text:span></text:p>
      <text:p text:style-name="P1"/>
      <text:p text:style-name="P7"><text:span text:style-name="T11">Unkempt</text:span><text:span text:style-name="T1"> (4): You are less diligent about cleanliness and grooming than is considered proper. As a result, some characters will view you as uncivilized or undisciplined, and you get a -10 penalty to all culture rolls. This may not be taken with Vain.</text:span></text:p>
      <text:p text:style-name="P1"/>
      <text:p text:style-name="P7"><text:span text:style-name="T10">Unlucky</text:span><text:span text:style-name="T1"> (8): Once per adventure, the GM may apply a -5 penalty to any non-initiative ro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0.1252in" fo:margin-right="0.6252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66" meta:word-count="1019" meta:character-count="5852" meta:non-whitespace-character-count="4760"/>
    <meta:generator>LibreOfficeDev/6.0.5.2$Linux_X86_64 LibreOffice_project/</meta:generator>
  </office:meta>
</office:document-meta>
</file>