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paragraph-properties fo:margin-top="0.0835in" fo:margin-bottom="0in" loext:contextual-spacing="false" fo:line-height="100%" fo:break-before="auto" fo:break-after="auto"/>
    </style:style>
    <style:style style:name="P2" style:family="paragraph" style:parent-style-name="Standard">
      <style:paragraph-properties fo:margin-top="0.0835in" fo:margin-bottom="0in" loext:contextual-spacing="false" fo:line-height="100%" fo:break-before="auto" fo:break-after="auto"/>
      <style:text-properties style:font-name="Times New Roman" style:font-name-asian="Times New Roman1" style:font-name-complex="Times New Roman1"/>
    </style:style>
    <style:style style:name="P3" style:family="paragraph" style:parent-style-name="Standard">
      <style:paragraph-properties fo:margin-top="0.0835in" fo:margin-bottom="0in" loext:contextual-spacing="false" fo:line-height="100%" fo:break-before="auto" fo:break-after="auto"/>
      <style:text-properties style:font-name="Times New Roman" fo:background-color="#3d85c6" style:font-name-asian="Times New Roman1" style:font-name-complex="Times New Roman1"/>
    </style:style>
    <style:style style:name="P4" style:family="paragraph" style:parent-style-name="Standard" style:master-page-name="Standard">
      <style:paragraph-properties fo:margin-top="0.0835in" fo:margin-bottom="0in" loext:contextual-spacing="false" fo:line-height="100%" fo:text-align="center" style:justify-single-word="false" style:page-number="1" fo:break-before="auto" fo:break-after="auto"/>
    </style:style>
    <style:style style:name="P5" style:family="paragraph" style:parent-style-name="Standard">
      <style:paragraph-properties fo:margin-left="0in" fo:margin-right="0in" fo:margin-top="0.0835in" fo:margin-bottom="0in" loext:contextual-spacing="false" fo:line-height="100%" fo:text-indent="0in" style:auto-text-indent="false" fo:break-before="auto" fo:break-after="auto"/>
    </style:style>
    <style:style style:name="P6" style:family="paragraph" style:parent-style-name="Standard">
      <style:paragraph-properties fo:margin-left="0in" fo:margin-right="0in" fo:line-height="100%" fo:text-align="justify" style:justify-single-word="false" fo:text-indent="0in" style:auto-text-indent="false" fo:break-before="auto" fo:break-after="auto"/>
    </style:style>
    <style:style style:name="P7" style:family="paragraph" style:parent-style-name="Standard">
      <style:paragraph-properties fo:break-before="auto" fo:break-after="auto"/>
    </style:style>
    <style:style style:name="P8" style:family="paragraph" style:parent-style-name="Standard">
      <style:paragraph-properties fo:line-height="100%" fo:break-before="auto" fo:break-after="auto"/>
    </style:style>
    <style:style style:name="P9" style:family="paragraph" style:parent-style-name="Standard">
      <style:paragraph-properties fo:line-height="100%" fo:text-align="justify" style:justify-single-word="false" fo:break-before="auto" fo:break-after="auto"/>
    </style:style>
    <style:style style:name="P10" style:family="paragraph" style:parent-style-name="Standard">
      <style:paragraph-properties fo:line-height="100%" fo:text-align="justify" style:justify-single-word="false" fo:break-before="auto" fo:break-after="auto"/>
      <style:text-properties style:font-name="Times New Roman" style:font-name-asian="Times New Roman1" style:font-name-complex="Times New Roman1"/>
    </style:style>
    <style:style style:name="P11" style:family="paragraph" style:parent-style-name="Standard">
      <style:paragraph-properties fo:line-height="100%" fo:text-align="justify" style:justify-single-word="false" fo:break-before="auto" fo:break-after="auto"/>
      <style:text-properties style:font-name="Times New Roman" fo:font-weight="bold" style:font-name-asian="Times New Roman1" style:font-weight-asian="bold" style:font-name-complex="Times New Roman1" style:font-weight-complex="bold"/>
    </style:style>
    <style:style style:name="P12" style:family="paragraph" style:parent-style-name="Standard">
      <style:paragraph-properties fo:margin-top="0.1665in" fo:margin-bottom="0.1665in" loext:contextual-spacing="false" fo:line-height="100%" fo:text-align="justify" style:justify-single-word="false" fo:break-before="auto" fo:break-after="auto"/>
    </style:style>
    <style:style style:name="P13" style:family="paragraph" style:parent-style-name="Standard">
      <style:paragraph-properties fo:margin-top="0.1665in" fo:margin-bottom="0.1665in" loext:contextual-spacing="false" fo:line-height="100%" fo:text-align="justify" style:justify-single-word="false" fo:break-before="auto" fo:break-after="auto"/>
      <style:text-properties style:font-name="Times New Roman" style:font-name-asian="Times New Roman1" style:font-name-complex="Times New Roman1"/>
    </style:style>
    <style:style style:name="P14" style:family="paragraph" style:parent-style-name="Heading_20_3">
      <style:paragraph-properties fo:margin-top="0.1945in" fo:margin-bottom="0.0555in" loext:contextual-spacing="false" fo:line-height="100%" fo:text-align="justify" style:justify-single-word="false" fo:keep-together="auto" fo:break-before="auto" fo:break-after="auto" fo:keep-with-next="auto"/>
    </style:style>
    <style:style style:name="P15" style:family="paragraph">
      <loext:graphic-properties draw:fill="solid" draw:fill-color="#a0a0a0"/>
      <style:paragraph-properties fo:text-align="center"/>
    </style:style>
    <style:style style:name="T1" style:family="text">
      <style:text-properties style:font-name="Times New Roman" fo:font-size="14pt" fo:background-color="#cfe2f3" loext:char-shading-value="0" style:font-name-asian="Times New Roman1" style:font-size-asian="14pt" style:font-name-complex="Times New Roman1" style:font-size-complex="14pt"/>
    </style:style>
    <style:style style:name="T2" style:family="text">
      <style:text-properties style:font-name="Times New Roman" style:font-name-asian="Times New Roman1" style:font-name-complex="Times New Roman1"/>
    </style:style>
    <style:style style:name="T3" style:family="text">
      <style:text-properties style:font-name="Times New Roman" style:font-name-asian="Times New Roman1" style:font-name-complex="Times New Roman1" fo:background-color="#ffffff"/>
    </style:style>
    <style:style style:name="T4" style:family="text">
      <style:text-properties style:font-name="Times New Roman" style:font-name-asian="Times New Roman1" style:font-name-complex="Times New Roman1" fo:background-color="#00ffff"/>
    </style:style>
    <style:style style:name="T5" style:family="text">
      <style:text-properties style:font-name="Times New Roman" style:text-underline-style="solid" style:text-underline-width="auto" style:text-underline-color="font-color" fo:font-weight="bold" style:font-name-asian="Times New Roman1" style:font-weight-asian="bold" style:font-name-complex="Times New Roman1" style:font-weight-complex="bold"/>
    </style:style>
    <style:style style:name="T6" style:family="text">
      <style:text-properties style:font-name="Times New Roman" style:text-underline-style="solid" style:text-underline-width="auto" style:text-underline-color="font-color" fo:font-weight="bold" style:font-name-asian="Times New Roman1" style:font-weight-asian="bold" style:font-name-complex="Times New Roman1" style:font-weight-complex="bold" fo:background-color="#ffffff"/>
    </style:style>
    <style:style style:name="T7" style:family="text">
      <style:text-properties style:font-name="Times New Roman" fo:font-weight="bold" style:font-name-asian="Times New Roman1" style:font-weight-asian="bold" style:font-name-complex="Times New Roman1" style:font-weight-complex="bold"/>
    </style:style>
    <style:style style:name="T8" style:family="text">
      <style:text-properties style:font-name="Times New Roman" fo:font-weight="bold" style:font-name-asian="Times New Roman1" style:font-weight-asian="bold" style:font-name-complex="Times New Roman1" style:font-weight-complex="bold" fo:background-color="#ffffff"/>
    </style:style>
    <style:style style:name="T9" style:family="text">
      <style:text-properties style:font-name="Times New Roman" fo:font-weight="bold" fo:background-color="#9d7909" loext:char-shading-value="0" style:font-name-asian="Times New Roman1" style:font-weight-asian="bold" style:font-name-complex="Times New Roman1" style:font-weight-complex="bold"/>
    </style:style>
    <style:style style:name="T10" style:family="text">
      <style:text-properties style:font-name="Times New Roman" fo:font-weight="bold" fo:background-color="#f1c232" loext:char-shading-value="0" style:font-name-asian="Times New Roman1" style:font-weight-asian="bold" style:font-name-complex="Times New Roman1" style:font-weight-complex="bold"/>
    </style:style>
    <style:style style:name="T11" style:family="text">
      <style:text-properties style:font-name="Times New Roman" fo:font-weight="bold" fo:background-color="#ead1dc" loext:char-shading-value="0" style:font-name-asian="Times New Roman1" style:font-weight-asian="bold" style:font-name-complex="Times New Roman1" style:font-weight-complex="bold"/>
    </style:style>
    <style:style style:name="T12" style:family="text">
      <style:text-properties style:font-name="Times New Roman" fo:background-color="#e6b8af" loext:char-shading-value="0" style:font-name-asian="Times New Roman1" style:font-name-complex="Times New Roman1"/>
    </style:style>
    <style:style style:name="T13" style:family="text">
      <style:text-properties style:font-name="Times New Roman" fo:background-color="#9d7909" loext:char-shading-value="0" style:font-name-asian="Times New Roman1" style:font-name-complex="Times New Roman1"/>
    </style:style>
    <style:style style:name="T14" style:family="text">
      <style:text-properties style:font-name="Times New Roman" fo:background-color="#3d85c6" loext:char-shading-value="0" style:font-name-asian="Times New Roman1" style:font-name-complex="Times New Roman1"/>
    </style:style>
    <style:style style:name="T15" style:family="text">
      <style:text-properties style:font-name="Times New Roman" fo:background-color="#d9ead3" loext:char-shading-value="0" style:font-name-asian="Times New Roman1" style:font-name-complex="Times New Roman1"/>
    </style:style>
    <style:style style:name="T16" style:family="text">
      <style:text-properties style:font-name="Times New Roman" fo:background-color="#b7b7b7" loext:char-shading-value="0" style:font-name-asian="Times New Roman1" style:font-name-complex="Times New Roman1"/>
    </style:style>
    <style:style style:name="T17" style:family="text">
      <style:text-properties style:font-name="Times New Roman" fo:background-color="#ead1dc" loext:char-shading-value="0" style:font-name-asian="Times New Roman1" style:font-name-complex="Times New Roman1"/>
    </style:style>
    <style:style style:name="T18" style:family="text">
      <style:text-properties style:font-name="Times New Roman" fo:font-style="italic" style:text-underline-style="solid" style:text-underline-width="auto" style:text-underline-color="font-color" style:font-name-asian="Times New Roman1" style:font-style-asian="italic" style:font-name-complex="Times New Roman1" style:font-style-complex="italic"/>
    </style:style>
    <style:style style:name="T19" style:family="text">
      <style:text-properties style:font-name="Times New Roman" fo:background-color="#9fc5e8" loext:char-shading-value="0" style:font-name-asian="Times New Roman1" style:font-name-complex="Times New Roman1"/>
    </style:style>
    <style:style style:name="T20" style:family="text">
      <style:text-properties style:font-name="Times New Roman" fo:background-color="#f1c232" loext:char-shading-value="0" style:font-name-asian="Times New Roman1" style:font-name-complex="Times New Roman1"/>
    </style:style>
    <style:style style:name="T21" style:family="text">
      <style:text-properties style:font-name="Times New Roman" fo:background-color="#93c47d" loext:char-shading-value="0" style:font-name-asian="Times New Roman1" style:font-name-complex="Times New Roman1"/>
    </style:style>
    <style:style style:name="T22" style:family="text">
      <style:text-properties style:font-name="Times New Roman" fo:background-color="#43cec3" loext:char-shading-value="0" style:font-name-asian="Times New Roman1" style:font-name-complex="Times New Roman1"/>
    </style:style>
    <style:style style:name="T23" style:family="text">
      <style:text-properties style:font-name="Times New Roman" fo:font-size="12pt" style:font-name-asian="Times New Roman1" style:font-size-asian="12pt" style:font-name-complex="Times New Roman1" style:font-size-complex="12pt"/>
    </style:style>
    <style:style style:name="T24" style:family="text">
      <style:text-properties style:font-name="Times New Roman" fo:background-color="#d0e0e3" loext:char-shading-value="0" style:font-name-asian="Times New Roman1" style:font-name-complex="Times New Roman1"/>
    </style:style>
    <style:style style:name="T25" style:family="text">
      <style:text-properties style:font-name="Times New Roman" fo:background-color="#fff2cc" loext:char-shading-value="0" style:font-name-asian="Times New Roman1" style:font-name-complex="Times New Roman1"/>
    </style:style>
    <style:style style:name="T26" style:family="text">
      <style:text-properties fo:background-color="#d0e0e3" loext:char-shading-value="0"/>
    </style:style>
    <style:style style:name="T27" style:family="text">
      <style:text-properties fo:color="#f30d0d" style:font-name="Times New Roman" style:font-name-asian="Times New Roman1" style:font-name-complex="Times New Roman1"/>
    </style:style>
    <style:style style:name="T28" style:family="text">
      <style:text-properties fo:color="#f30d0d" style:font-name="Times New Roman" style:font-name-asian="Times New Roman1" style:font-name-complex="Times New Roman1" fo:background-color="#ffffff"/>
    </style:style>
    <style:style style:name="T29" style:family="text">
      <style:text-properties fo:background-color="#ffffff"/>
    </style:style>
    <style:style style:name="T30" style:family="text">
      <style:text-properties fo:background-color="#3d85c6" loext:char-shading-value="0"/>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fo:font-weight="bold" style:font-weight-asian="bold" style:font-weight-complex="bold" fo:background-color="#ffffff"/>
    </style:style>
    <style:style style:name="T33" style:family="text">
      <style:text-properties fo:background-color="#e6b8af" loext:char-shading-value="0"/>
    </style:style>
    <style:style style:name="T34" style:family="text">
      <style:text-properties fo:color="#1155cc" style:text-underline-style="solid" style:text-underline-width="auto" style:text-underline-color="font-color" fo:background-color="#ffffff"/>
    </style:style>
    <style:style style:name="T35" style:family="text">
      <style:text-properties fo:color="#1155cc" style:font-name="Times New Roman" style:text-underline-style="solid" style:text-underline-width="auto" style:text-underline-color="font-color" style:font-name-asian="Times New Roman1" style:font-name-complex="Times New Roman1"/>
    </style:style>
    <style:style style:name="T36" style:family="text">
      <style:text-properties fo:color="#a64d79" style:font-name="Times New Roman" style:font-name-asian="Times New Roman1" style:font-name-complex="Times New Roman1"/>
    </style:style>
    <style:style style:name="T37" style:family="text">
      <style:text-properties fo:color="#000000" style:font-name="Times New Roman" fo:font-size="11pt" fo:font-weight="bold" fo:background-color="#43cec3" loext:char-shading-value="0" style:font-name-asian="Times New Roman1" style:font-size-asian="11pt" style:font-weight-asian="bold" style:font-name-complex="Times New Roman1" style:font-size-complex="11pt" style:font-weight-complex="bold"/>
    </style:style>
    <style:style style:name="T38" style:family="text">
      <style:text-properties fo:color="#000000" style:font-name="Times New Roman" fo:font-size="11pt" fo:font-weight="bold" style:font-name-asian="Times New Roman1" style:font-size-asian="11pt" style:font-weight-asian="bold" style:font-name-complex="Times New Roman1" style:font-size-complex="11pt" style:font-weight-complex="bold" fo:background-color="#ffffff"/>
    </style:style>
    <style:style style:name="T39" style:family="text">
      <style:text-properties fo:color="#000000" style:font-name="Times New Roman" fo:font-size="11pt" fo:font-weight="bold" style:font-name-asian="Times New Roman1" style:font-size-asian="11pt" style:font-weight-asian="bold" style:font-name-complex="Times New Roman1" style:font-size-complex="11pt" style:font-weight-complex="bold"/>
    </style:style>
    <style:style style:name="T40" style:family="text">
      <style:text-properties fo:color="#000000" style:font-name="Times New Roman" fo:font-size="11pt" fo:font-weight="bold" fo:background-color="#6aa84f" loext:char-shading-value="0" style:font-name-asian="Times New Roman1" style:font-size-asian="11pt" style:font-weight-asian="bold" style:font-name-complex="Times New Roman1" style:font-size-complex="11pt" style:font-weight-complex="bold"/>
    </style:style>
    <style:style style:name="T41" style:family="text">
      <style:text-properties fo:color="#1c4587" style:font-name="Times New Roman" style:font-name-asian="Times New Roman1" style:font-name-complex="Times New Roman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70 to skill rolls when talking to moto (before halved)</text:span></text:p>
      <text:p text:style-name="P1"><text:span text:style-name="T2"><text:tab/><text:tab/><text:tab/><text:tab/><text:tab/><text:tab/><text:tab/>EX: Spent 466/481 xp total <text:s text:c="3"/>(280 xp Earned)</text:span></text:p>
      <text:p text:style-name="P1"><text:span text:style-name="T2">Fire:<text:tab/></text:span><text:span text:style-name="T5">3</text:span><text:span text:style-name="T2"><text:tab/><text:tab/><text:tab/><text:tab/><text:tab/><text:tab/>Honor<text:tab/><text:tab/></text:span><text:span text:style-name="T5">5</text:span><text:span text:style-name="T2"> +.5*1k1 - 0.5</text:span></text:p>
      <text:p text:style-name="P5"><text:span text:style-name="T2">Water:<text:tab/></text:span><text:span text:style-name="T5">5</text:span><text:span text:style-name="T2"><text:tab/><text:tab/><text:tab/><text:tab/><text:tab/><text:tab/>Recognition </text:span><text:span text:style-name="T5">7</text:span><text:span text:style-name="T2"> +1 (Good Rep.) &amp; +2 non-Uru (F. Sword)</text:span></text:p>
      <text:p text:style-name="P1"><text:span text:style-name="T2">Air:<text:tab/></text:span><text:span text:style-name="T5">3</text:span><text:span text:style-name="T7"><text:tab/></text:span><text:span text:style-name="T2"><text:tab/><text:tab/><text:tab/><text:tab/><text:tab/>Rank<text:tab/></text:span><text:span text:style-name="T5">10</text:span><text:span text:style-name="T2"> +2 if rec. and +2 Moto (or +4 Unicorn) or +3 non-Moto</text:span></text:p>
      <text:p text:style-name="P1"><text:span text:style-name="T2">Earth:<text:tab/></text:span><text:span text:style-name="T5">5</text:span><text:span text:style-name="T2"> <text:tab/><text:tab/><text:tab/><text:tab/><text:tab/><text:tab/>Wound Check: </text:span><text:span text:style-name="T12">+1k0</text:span><text:span text:style-name="T3"> <text:s/></text:span><text:span text:style-name="T26">3Dan</text:span></text:p>
      <text:p text:style-name="P1"><text:span text:style-name="T2">Void: <text:tab/></text:span><text:span text:style-name="T5">5</text:span><text:span text:style-name="T2"><text:tab/><text:tab/><text:tab/><text:tab/><text:tab/><text:tab/>vp available: <text:s/>1 of 3 </text:span></text:p>
      <text:p text:style-name="P1"><text:span text:style-name="T2"><text:tab/><text:tab/><text:tab/><text:tab/><text:tab/><text:tab/>Light wounds:<text:tab/>26 <text:s text:c="3"/>taint dam lw: 20 sw: 0.4 (28 days max)+.1 death: 29</text:span></text:p>
      <text:p text:style-name="P1"><text:span text:style-name="T2"><text:tab/><text:tab/><text:tab/><text:tab/><text:tab/><text:tab/><text:tab/>Serious wounds:<text:tab/>3 out of 11 (</text:span><text:span text:style-name="T27">+1 Serious needed to be killed</text:span><text:span text:style-name="T2">)<text:line-break/><text:tab/><text:tab/><text:tab/><text:tab/><text:tab/><text:tab/><text:tab/>Last heal morning of 11th(12th due to research) /vp at 2 on 12th<text:line-break/><text:tab/><text:tab/><text:tab/><text:tab/><text:tab/><text:tab/><text:tab/>Unlucky: last used against Oni battle% 11th adv<text:line-break/></text:span></text:p>
      <text:p text:style-name="P6"><text:span text:style-name="T2">Discern Honor<text:tab/></text:span><text:span text:style-name="T5">5</text:span><text:span text:style-name="T2"><text:tab/>+ 0.5 * (1k1 – 0.5) (can be between -2.0 to +2.5)<text:tab/><text:tab/><text:tab/><text:tab/> </text:span><text:span text:style-name="T13">+1k0 on damage rolls</text:span></text:p>
      <text:p text:style-name="P6"><text:span text:style-name="T2">Iaijutsu<text:tab/><text:tab/></text:span><text:span text:style-name="T5">5</text:span><text:span text:style-name="T2"><text:tab/><text:tab/><text:tab/><text:tab/><text:tab/>Attack:<text:tab/></text:span><text:span text:style-name="T5">4</text:span><text:span text:style-name="T2"> </text:span><text:span text:style-name="T26">3Dan</text:span><text:span text:style-name="T29">+</text:span><text:span text:style-name="T30">2x </text:span><text:span text:style-name="T14">Water to attack rolls</text:span><text:span text:style-name="T2"> </text:span><text:span text:style-name="T13">+1k0 &amp; Once a round, +5</text:span></text:p>
      <text:p text:style-name="P6"><text:span text:style-name="T15">Presence<text:tab/></text:span><text:span text:style-name="T6">5</text:span><text:span text:style-name="T3"><text:tab/></text:span><text:span text:style-name="T2"><text:tab/><text:tab/><text:tab/><text:tab/>Parry:<text:tab/></text:span><text:span text:style-name="T5">5</text:span><text:span text:style-name="T7"> <text:s text:c="2"/></text:span><text:span text:style-name="T9">When using 5th Dan + 5 damage when facing downhill</text:span></text:p>
      <text:p text:style-name="P1"><text:span text:style-name="T15">(Once per convo roll this knack instead of any skill for a contested roll initiated by diff character.)</text:span></text:p>
      <text:p text:style-name="P1"><draw:rect text:anchor-type="as-char" style:rel-width="100%" draw:z-index="0" draw:style-name="gr1" draw:text-style-name="P15" svg:width="0.0012in" svg:height="0.0213in"><text:p/></draw:rect></text:p>
      <text:p text:style-name="P2"/>
      <text:p text:style-name="P1"><text:span text:style-name="T16">Acting</text:span><text:span text:style-name="T3"><text:tab/></text:span><text:span text:style-name="T6">0</text:span><text:span text:style-name="T3"> </text:span><text:span text:style-name="T2">(sincerity, intimidation, and sneaking)<text:tab/><text:tab/><text:tab/></text:span><text:span text:style-name="T4">Commerce</text:span><text:span text:style-name="T3"> </text:span><text:span text:style-name="T6">0</text:span></text:p>
      <text:p text:style-name="P8"><text:tab/><text:tab/><text:tab/></text:p>
      <text:p text:style-name="P1"><text:span text:style-name="T4">Interrogation</text:span> <text:s/><text:span text:style-name="T31">5</text:span> +<text:span text:style-name="T33">1k0</text:span><text:tab/>/ +10<text:tab/><text:span text:style-name="T26">3Dan</text:span><text:tab/><text:tab/><text:tab/><text:tab/><text:span text:style-name="T4">History</text:span><text:span text:style-name="T3"> </text:span><text:span text:style-name="T6">3</text:span><text:span text:style-name="T3"> </text:span><text:span text:style-name="T2">(raise on culture, law, strategy </text:span><text:span text:style-name="T17">&amp; heraldry up to 25</text:span><text:span text:style-name="T2">)</text:span></text:p>
      <text:p text:style-name="P8"><text:tab/><text:tab/></text:p>
      <text:p text:style-name="P1"><text:span text:style-name="T16">Manipulation</text:span><text:span text:style-name="T29"> </text:span><text:span text:style-name="T32">0</text:span><text:span text:style-name="T29"> </text:span><text:span text:style-name="T3">+20 to ally</text:span><text:span text:style-name="T29"><text:tab/><text:tab/></text:span><text:tab/><text:tab/><text:tab/><text:span text:style-name="T4">Underworld</text:span><text:span text:style-name="T3"> </text:span><text:span text:style-name="T6">1</text:span><text:span text:style-name="T8"> <text:s text:c="2"/></text:span><text:span text:style-name="T3"><text:s/></text:span><text:span text:style-name="T26">3Dan</text:span></text:p>
      <text:p text:style-name="P8"><text:soft-page-break/></text:p>
      <text:p text:style-name="P8"><draw:rect text:anchor-type="as-char" style:rel-width="100%" draw:z-index="1" draw:style-name="gr1" draw:text-style-name="P15" svg:width="0.0012in" svg:height="0.0213in"><text:p/></draw:rect></text:p>
      <text:p text:style-name="P8"><text:tab/><text:tab/><text:tab/></text:p>
      <text:p text:style-name="P1"><text:span text:style-name="T16">Bragging</text:span><text:span text:style-name="T2"> </text:span><text:span text:style-name="T5">1</text:span><text:span text:style-name="T2"> </text:span><text:span text:style-name="T3">(</text:span><text:span text:style-name="T19">H+Rec</text:span><text:span text:style-name="T3">.+x2 diff to^) </text:span><text:span text:style-name="T19">30</text:span><text:span text:style-name="T3">+20 ally </text:span><text:span text:style-name="T2">&amp; +</text:span><text:span text:style-name="T20">45</text:span><text:span text:style-name="T2"> </text:span><text:span text:style-name="T21">non</text:span><text:span text:style-name="T22">-uru</text:span><text:span text:style-name="T2"> <text:s/><text:tab/></text:span><text:span text:style-name="T4">Culture</text:span><text:span text:style-name="T3"> </text:span><text:span text:style-name="T6">2</text:span><text:span text:style-name="T3"> (</text:span><text:span text:style-name="T17">-</text:span><text:span text:style-name="T3">10 + 15) &amp; </text:span><text:span text:style-name="T21">+20 to moto</text:span></text:p>
      <text:p text:style-name="P8"><text:tab/><text:tab/><text:tab/></text:p>
      <text:p text:style-name="P1"><text:span text:style-name="T16">Etiquette</text:span><text:span text:style-name="T3"> </text:span><text:span text:style-name="T6">2</text:span><text:span text:style-name="T3"> </text:span><text:span text:style-name="T21">+20 to moto</text:span><text:span text:style-name="T3"><text:tab/></text:span><text:span text:style-name="T2"><text:tab/><text:tab/><text:tab/><text:tab/><text:tab/></text:span><text:span text:style-name="T4">Heraldry</text:span><text:span text:style-name="T3"> </text:span><text:span text:style-name="T6">0</text:span><text:span text:style-name="T3"> </text:span><text:span text:style-name="T21">+20 to moto</text:span><text:span text:style-name="T3"> &amp; +20 to non-moto &amp; </text:span><text:span text:style-name="T17">+15 up to 25</text:span></text:p>
      <text:p text:style-name="P8"><text:tab/><text:tab/><text:tab/></text:p>
      <text:p text:style-name="P1"><text:span text:style-name="T16">Intimidation</text:span><text:span text:style-name="T3"> </text:span><text:span text:style-name="T6">1</text:span><text:span text:style-name="T3"> +</text:span><text:span text:style-name="T20">25</text:span><text:span text:style-name="T3"> </text:span><text:span text:style-name="T2">to </text:span><text:span text:style-name="T22">non-uru</text:span><text:span text:style-name="T3"> <text:s/></text:span><text:span text:style-name="T29"><text:s text:c="2"/></text:span><text:span text:style-name="T26">3Dan</text:span><text:tab/><text:span text:style-name="T2"><text:tab/><text:tab/><text:tab/></text:span><text:span text:style-name="T4">Investigation</text:span><text:span text:style-name="T2"> </text:span><text:span text:style-name="T5">5</text:span><text:span text:style-name="T2"> <text:s/></text:span><text:span text:style-name="T12">+1k0</text:span><text:span text:style-name="T3"> + 10</text:span></text:p>
      <text:p text:style-name="P8"><text:tab/><text:tab/><text:tab/></text:p>
      <text:p text:style-name="P1"><text:span text:style-name="T16">Sincerity</text:span><text:span text:style-name="T3"> </text:span><text:span text:style-name="T6">3</text:span><text:span text:style-name="T3"> (H x2 if open) +20 on open if to peasant<text:tab/><text:tab/></text:span><text:span text:style-name="T4">Law</text:span><text:span text:style-name="T3"> </text:span><text:span text:style-name="T6">5</text:span><text:span text:style-name="T3"> + 15 <text:s text:c="2"/></text:span><text:span text:style-name="T26">3Dan</text:span></text:p>
      <text:p text:style-name="P8"><text:tab/><text:tab/><text:tab/></text:p>
      <text:p text:style-name="P1"><text:span text:style-name="T16">Sneaking</text:span><text:span text:style-name="T3"> </text:span><text:span text:style-name="T6">0</text:span><text:span text:style-name="T3"><text:tab/></text:span><text:span text:style-name="T2"><text:tab/><text:tab/><text:tab/><text:tab/><text:tab/></text:span><text:span text:style-name="T4">Precepts</text:span><text:span text:style-name="T3"> </text:span><text:span text:style-name="T6">3</text:span><text:span text:style-name="T3"> +20 to ally </text:span><text:span text:style-name="T21">+20 moto</text:span><text:span text:style-name="T3"> &amp; +10 to</text:span><text:span text:style-name="T22"> non-uru</text:span><text:span text:style-name="T3"> &amp; (+x2 H)</text:span></text:p>
      <text:p text:style-name="P8"><text:tab/><text:tab/><text:tab/></text:p>
      <text:p text:style-name="P1"><text:span text:style-name="T16">Tact</text:span><text:span text:style-name="T3"> </text:span><text:span text:style-name="T6">3</text:span><text:span text:style-name="T3"> +20 to ally &amp; +20 on open if peasant<text:tab/></text:span><text:span text:style-name="T2"><text:tab/><text:tab/></text:span><text:span text:style-name="T4">Strategy</text:span><text:span text:style-name="T3"> </text:span><text:span text:style-name="T6">5</text:span><text:span text:style-name="T3"> + 15 &amp; 10 </text:span><text:span text:style-name="T2">to </text:span><text:span text:style-name="T22">non-uru</text:span></text:p>
      <text:p text:style-name="P2"/>
      <text:p text:style-name="P1"><draw:rect text:anchor-type="as-char" style:rel-width="100%" draw:z-index="2" draw:style-name="gr1" draw:text-style-name="P15" svg:width="0.0012in" svg:height="0.0213in"><text:p/></draw:rect><text:span text:style-name="T2">~$: 394 koku available</text:span></text:p>
      <text:p text:style-name="P1"><text:span text:style-name="T2">expenditures: starting 5k, spending 4k for Dragon units. - 500 for Wave Men for us, -1k for head of Moto that robbed the Hidden Way, +1k for favors for Yasuki, +750 for savings with </text:span><text:span text:style-name="T23">Eguden Yeke, -5 for ‘entertain &amp; guard Kuni Kiyo at home,’ +1k/-1k Yasuki/Fire-bird-sword scheme, -1 koku for Horse-stomping into the dirt tribute, -250x 3 for 3 +ninja retainers. -100 Kasim hired for translating Moto, Uru, and Bayad. <text:line-break/></text:span></text:p>
      <text:p text:style-name="P1"><text:span text:style-name="T2">Kitsuki Magistrate School</text:span></text:p>
      <text:p text:style-name="P2"/>
      <text:p text:style-name="P1"><text:span text:style-name="T2">School Ring:</text:span></text:p>
      <text:p text:style-name="P1"><text:span text:style-name="T2">Water</text:span></text:p>
      <text:p text:style-name="P2"><text:soft-page-break/></text:p>
      <text:p text:style-name="P1"><text:span text:style-name="T2">School Knacks:</text:span></text:p>
      <text:p text:style-name="P1"><text:span text:style-name="T2">Discern Honor (When you use this knack the GM tells you that that character's honor + 0.5 * (1k1 – 0.5). (can be between -2.0 to +2.5) After each conversation past the first, you get a more accurate idea of their honor, and the GM tells you a number which is 0.X closer to the truth, where X is your rank in this knack.)</text:span></text:p>
      <text:p text:style-name="P2"/>
      <text:p text:style-name="P1"><text:span text:style-name="T2"><text:s/>Iaijutsu </text:span></text:p>
      <text:p text:style-name="P2"/>
      <text:p text:style-name="P1"><text:span text:style-name="T2">Presence (Once per conversation, you may use your practiced presence of authority to roll this knack instead of any skill when making a contested roll initiated by another character.)</text:span></text:p>
      <text:p text:style-name="P2"/>
      <text:p text:style-name="P1"><text:span text:style-name="T2">Special Ability:</text:span></text:p>
      <text:p text:style-name="P1"><text:span text:style-name="T2">You use Water for interrogation rolls, and you </text:span><text:span text:style-name="T14">add twice your Water to all attack rolls.</text:span></text:p>
      <text:p text:style-name="P3"/>
      <text:p text:style-name="P1"><text:span text:style-name="T2">First Dan:</text:span></text:p>
      <text:p text:style-name="P1"><text:span text:style-name="T12">Roll one extra die on investigation, interrogation, and wound check rolls.</text:span></text:p>
      <text:p text:style-name="P1"><text:span text:style-name="T2">Second Dan:</text:span></text:p>
      <text:p text:style-name="P1"><text:span text:style-name="T2">You get a free raise on interrogation rolls.</text:span></text:p>
      <text:p text:style-name="P1"><text:span text:style-name="T24">Third Dan</text:span><text:span text:style-name="T3">:</text:span><text:span text:style-name="T25"> used in 11th adventure so far: 8 of 10</text:span></text:p>
      <text:p text:style-name="P1"><text:span text:style-name="T24">Each adventure you get 2X free raises, where X is equal to your investigation skill, which may be applied to the following rolls: interrogation, intimidation, law, underworld, attack, and wound checks. <text:s/>You may not spend more than X of these free raises on any single roll.</text:span></text:p>
      <text:p text:style-name="P1"><text:span text:style-name="T2">Fourth Dan:</text:span></text:p>
      <text:p text:style-name="P1"><text:span text:style-name="T2">Raise your current and maximum Water by 1. <text:s/>Raising your Water now costs 5 fewer XP.</text:span></text:p>
      <text:p text:style-name="P1"><text:span text:style-name="T2">You automatically know the Void, parry, and phase of the next action of each character during combat, and you know the result of contested rolls made against you out of combat.</text:span></text:p>
      <text:p text:style-name="P1"><text:span text:style-name="T2">Fifth Dan:</text:span></text:p>
      <text:p text:style-name="P1"><text:soft-page-break/><text:span text:style-name="T2">Your presence is so overwhelming that the Air, Fire and Water rings of chosen characters are reduced by one. <text:s/>You may do this to any one character, or you may do it to multiple characters so long as the sum of their experience does not exceed your experience. <text:s/>This does not work during the iaijutsu phase of a duel, and it does not stack with other Kitsuki Magistrates targeting the same character.</text:span></text:p>
      <text:p text:style-name="P2"/>
      <text:p text:style-name="P7"><text:span text:style-name="T29">Vows Tetsu took:</text:span><text:a xlink:type="simple" xlink:href="https://docs.google.com/document/d/1M6aexajTVF7CkN9q04I5E0lBxNlx_idbIcJizdpf2_A/edit" text:style-name="ListLabel_20_1" text:visited-style-name="ListLabel_20_1"><text:span text:style-name="T34"> https://docs.google.com/document/d/1M6aexajTVF7CkN9q04I5E0lBxNlx_idbIcJizdpf2_A/edi</text:span></text:a><text:a xlink:type="simple" xlink:href="https://docs.google.com/document/d/1M6aexajTVF7CkN9q04I5E0lBxNlx_idbIcJizdpf2_A/edit" text:style-name="ListLabel_20_2" text:visited-style-name="ListLabel_20_2"><text:span text:style-name="T35">t</text:span></text:a></text:p>
      <text:p text:style-name="P2"/>
      <text:p text:style-name="P2"/>
      <text:p text:style-name="P9"><text:span text:style-name="T7">Good Reputation</text:span><text:span text:style-name="T2"> (3): Your Recognition is considered 1.0 higher for the purposes of being recognized, and your Rank is considered to be 2.0 higher when dealing with anyone who knows your reputation. </text:span><text:span text:style-name="T36">‘Rectitude is one’s power to decide upon a course of conduct in accordance with reason, without wavering; to die when to die is right, to strike when to strike is right.’</text:span></text:p>
      <text:p text:style-name="P10"/>
      <text:p text:style-name="P10"/>
      <text:p text:style-name="P9"><text:span text:style-name="T7">Great Destiny</text:span><text:span text:style-name="T2"> (8</text:span><text:span text:style-name="T3">):</text:span><text:span text:style-name="T28"> It takes one additional serious wound to kill you.</text:span></text:p>
      <text:p text:style-name="P10"/>
      <text:p text:style-name="P9"><text:span text:style-name="T7">Kind Eye </text:span><text:span text:style-name="T2">(3): You get 4 free raises on tact and open sincerity rolls when talking to peasant characters such as servants who are often treated badly by samurai.</text:span></text:p>
      <text:p text:style-name="P10"/>
      <text:p text:style-name="P9"><text:span text:style-name="T7">Discerning</text:span><text:span text:style-name="T2"> (5): You get a free raise on interrogation rolls and 2 free raises on investigation rolls.</text:span></text:p>
      <text:p text:style-name="P11"/>
      <text:p text:style-name="P9"><text:span text:style-name="T10">Fierce</text:span><text:span text:style-name="T3"> </text:span><text:span text:style-name="T2">(2): You get a free raise on bragging and intimidation rolls.</text:span></text:p>
      <text:p text:style-name="P14"><text:bookmark text:name="_2ia6ig9audup"/><text:span text:style-name="T37">Famous Sword </text:span><text:span text:style-name="T38">[Advantage: 5 XP]</text:span></text:p>
      <text:p text:style-name="P12"><text:span text:style-name="T2">The greatest swords cannot be bought… but you spent years saving your accumulating wealth and looking out for families who would be so grateful for your financial gifts that they would be willing to give you one of their great family swords in return. As a result, you have acquired an especially renowned sword whose name is even more famous than your own.</text:span></text:p>
      <text:p text:style-name="P12"><text:span text:style-name="T2">While your sword will have some relatively small extra abilities (determined by the GM after you take this advantage), the main benefit is how much glory you bring yourself by wielding it. In the eyes of all non-Moto samurai, you are considered to have 2.0 higher Rank and Recognition, 4 free raises on bragging and intimidation rolls, and 2 free raises on precepts and strategy rolls.</text:span></text:p>
      <text:p text:style-name="P12"><text:span text:style-name="T41">The origins of this sword are unknown. Its known history begins with Mirumoto Tsuki, who was part of the army that defeated the Maw at the Battle of the Cresting Wave. Her own sword destroyed, she pulled the sword of a fallen comrade out of the Maw’s hide. The sword seemed to move under its own power, hacking and slicing into the Maw, especially when striking from west to east. When the final coordinated strike from the remaining warriors finally slew the Maw, Tsuki was the only member of the Dragon clan to help deal the killing blow.</text:span></text:p>
      <text:p text:style-name="P12"><text:span text:style-name="T41">She named the sword Yamaoroshi – “Wind Blowing Down the Mountain''. As the sword that slew the Maw, it gained great renown and 150 years later made its way into the hands of a duelist named Mirumoto Tetsushi, who used it to defeat Kakita Senri, chief instructor of the Kakita dueling academy. Already an underdog in the fight, Tetsushi chose to face east into the morning sun, practically blinding him in the garden where they fought. Yet he emerged victorious, explaining afterwards that just as the Wind Blows Down the Mountain, so too does this sword desire to be striking in the direction from higher elevation to lower elevation, even when its wielder is standing on flat ground.</text:span></text:p>
      <text:p text:style-name="P12"><text:span text:style-name="T41">Yamaoroshi later became the family sword of Agasha Shigeaki, one of the companions of Agasha Kitsuki, and struck down several of the assassins bent on murdering Mirumoto Januko, the daimyo of the Mirumoto family when the Unicorn returned. Agasha Kitsuki was granted his own Family name, and so Shigeaki then became Kitsuki Shigeaki, and Yamaoroshi has stayed with the Kitsuki family ever since.</text:span></text:p>
      <text:p text:style-name="P13"><text:soft-page-break/></text:p>
      <text:p text:style-name="P13"/>
      <text:p text:style-name="P13"/>
      <text:p text:style-name="P14"><text:bookmark text:name="_qytc8fxmqktf"/><text:span text:style-name="T38">Equestrian</text:span><text:span text:style-name="T39"> [Advantage: 3 XP]</text:span></text:p>
      <text:p text:style-name="P12"><text:span text:style-name="T2">The Hidden Way is headquartered in Unicorn lands, where horses are valued almost as much as swords. While most of the rest of the empire rides smaller ponies of no note, the Shinjo and Otaku samurai can trace the pedigree of their horses back all the way to the Ancestral Progenitors (the best horses of Shinjo and her personal vassals). Such horses are tested in competition to determine the strongest and fastest, with the best of these fetching hundreds of koku.</text:span></text:p>
      <text:p text:style-name="P12"><text:span text:style-name="T2">You’ve spent years accumulating a personal stable containing dozens of the finest horses, especially Shinjo riding steeds and Otaku battle horses (the Otaku ones are all geldings, since the Otaku strictly forbid the trading of breeding horses). Your collection is known far and wide as rivaling even the personal stables of Unicorn daimyo, and horse traders and breeders travel to Outsider Keep from all over Unicorn lands to make deals and arrangements with you.</text:span></text:p>
      <text:p text:style-name="P12"><text:span text:style-name="T2">Your Rank is considered 2.0 higher to all members of the Unicorn clan (including Moto) and 1.0 higher for all other samurai. You get 4 free raises on Bragging rolls and Heraldry rolls for non-Moto.</text:span></text:p>
      <text:p text:style-name="P14"><text:bookmark text:name="_ffv320ie4deq"/><text:span text:style-name="T40">Friend of the Clans</text:span><text:span text:style-name="T39"> [Advantage: 3 XP]</text:span></text:p>
      <text:p text:style-name="P12"><text:span text:style-name="T2">The Moto are a strange people, barely civilized and largely ignorant of proper behavior and custom. Even worse, they mostly operate under the delusion that the situation is opposite from reality – that the Rokugani don’t understand society! The PCs are more familiar with Moto ways than practically anyone in the Empire, and yet your social and knowledge skill rolls when interacting with them do not reroll 10s and are halved.</text:span></text:p>
      <text:p text:style-name="P12"><text:span text:style-name="T2">Your past actions have impressed the Moto, whether because of deeds performed for their benefit, or impressive feats and accomplishments, or generous gifts and time spent with them. Regardless, while your rolls are still halved in the eyes of the Moto, you are allowed to reroll 10s, and you get 4 free raises on all bragging, etiquette, intimidation, culture, heraldry, and precepts rolls.</text:span></text:p>
      <text:p text:style-name="P14"><text:bookmark text:name="_1aysosggjvo"/><text:span text:style-name="T39">Major Ally: Battalion Commander [Advantage: 2 XP]</text:span></text:p>
      <text:p text:style-name="P12"><text:span text:style-name="T2">You have performed an act of service towards one of the Battalion Commanders so significant it can never be repaid. Perhaps you saved their life, or stopped a conspiracy which would have disgraced their child, or made it possible for their sister to marry her true love. Regardless, you have earned their eternal friendship, and everyone in the battalion knows it. Even in cases where a company is on shaky terms with their battalion commander, any legionnaire in that company would be putting themselves at risk by denying you a request. Additionally, you get 4 free raises on all tact, bragging, precepts, and manipulation rolls in the eyes of any member of that battalion.</text:span></text:p>
      <text:p text:style-name="P13"/>
      <text:p text:style-name="P13"/>
      <text:p text:style-name="P9"><text:span text:style-name="T7">Contrary</text:span><text:span text:style-name="T2"> (5): You cannot remain a neutral third party in any disagreement; you must actively take a side.</text:span></text:p>
      <text:p text:style-name="P2"/>
      <text:p text:style-name="P9"><text:span text:style-name="T7">Long Temper</text:span><text:span text:style-name="T2"> (5): You hold grudges over perceived insults, especially over matters of honor. Although you need not react immediately, you will not forget the insult and will burn with the need to extract payback.</text:span></text:p>
      <text:p text:style-name="P10"/>
      <text:p text:style-name="P9"><text:span text:style-name="T7">Meddler</text:span><text:span text:style-name="T2"> (2): You want to know everything that's going on and investigate every interesting event around. Any intriguing goings on simply have to be looked into, no matter how sensitive the issue.</text:span></text:p>
      <text:p text:style-name="P10"/>
      <text:p text:style-name="P9"><text:span text:style-name="T7">Proud</text:span><text:span text:style-name="T2"> (2): You are a shameless self-promoter who will never be self-deprecating or play down accomplishments. You will never directly apologize or admit a mistake even when actually at fault.</text:span></text:p>
      <text:p text:style-name="P2"><text:soft-page-break/></text:p>
      <text:p text:style-name="P9"><text:span text:style-name="T11">Unkempt</text:span><text:span text:style-name="T2"> (4): You are less diligent about cleanliness and grooming than is considered proper. As a result, some characters will view you as uncivilized or undisciplined, and you get a -10 penalty to all culture rolls. This may not be taken with Vain.</text:span></text:p>
      <text:p text:style-name="P2"/>
      <text:p text:style-name="P9"><text:span text:style-name="T7">Unlucky</text:span><text:span text:style-name="T2"> (8): Once per adventure, the GM may apply a -5 penalty to any non-initiative ro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1252in" fo:margin-right="0.625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1" meta:word-count="1888" meta:character-count="10958" meta:non-whitespace-character-count="8982"/>
    <meta:generator>LibreOfficeDev/6.0.5.2$Linux_X86_64 LibreOffice_project/</meta:generator>
  </office:meta>
</office:document-meta>
</file>