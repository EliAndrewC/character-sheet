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ext-properties style:font-name="Times New Roman" fo:font-weight="bold" style:font-name-asian="Times New Roman1" style:font-weight-asian="bold" style:font-name-complex="Times New Roman1" style:font-weight-complex="bold"/>
    </style:style>
    <style:style style:name="P4" style:family="paragraph" style:parent-style-name="Standard">
      <style:paragraph-properties fo:margin-top="0.0835in" fo:margin-bottom="0in" loext:contextual-spacing="false" fo:line-height="100%"/>
    </style:style>
    <style:style style:name="P5" style:family="paragraph" style:parent-style-name="Standard" style:master-page-name="Standard">
      <style:paragraph-properties fo:margin-top="0.0835in" fo:margin-bottom="0in" loext:contextual-spacing="false" fo:line-height="100%" style:page-number="1"/>
    </style:style>
    <style:style style:name="P6" style:family="paragraph" style:parent-style-name="Standard">
      <style:paragraph-properties fo:margin-left="0in" fo:margin-right="0in" fo:margin-top="0.0835in" fo:margin-bottom="0in" loext:contextual-spacing="false" fo:line-height="100%" fo:text-indent="0.1252in" style:auto-text-indent="false"/>
    </style:style>
    <style:style style:name="P7" style:family="paragraph" style:parent-style-name="Standard">
      <style:paragraph-properties fo:margin-left="0in" fo:margin-right="0in" fo:margin-top="0.0835in" fo:margin-bottom="0in" loext:contextual-spacing="false" fo:line-height="100%" fo:text-indent="0.1252in" style:auto-text-indent="false"/>
      <style:text-properties style:font-name="Times New Roman" style:font-name-asian="Times New Roman1" style:font-name-complex="Times New Roman1"/>
    </style:style>
    <style:style style:name="P8" style:family="paragraph" style:parent-style-name="Standard">
      <style:paragraph-properties fo:margin-left="0in" fo:margin-right="0in" fo:line-height="100%" fo:text-indent="0.1252in" style:auto-text-indent="false"/>
    </style:style>
    <style:style style:name="P9" style:family="paragraph" style:parent-style-name="Standard">
      <style:paragraph-properties fo:margin-left="2in" fo:margin-right="0in" fo:margin-top="0.0835in" fo:margin-bottom="0in" loext:contextual-spacing="false" fo:line-height="100%" fo:text-indent="0.5in" style:auto-text-indent="false"/>
    </style:style>
    <style:style style:name="P10" style:family="paragraph" style:parent-style-name="Standard">
      <style:paragraph-properties fo:margin-left="0.25in" fo:margin-right="0in" fo:line-height="100%" fo:text-align="justify" style:justify-single-word="false" fo:text-indent="0in" style:auto-text-indent="false"/>
    </style:style>
    <style:style style:name="P11" style:family="paragraph" style:parent-style-name="Standard">
      <style:paragraph-properties fo:margin-left="0in" fo:margin-right="0in" fo:margin-top="0.0835in" fo:margin-bottom="0in" loext:contextual-spacing="false" fo:line-height="100%" fo:text-indent="0.5in" style:auto-text-indent="false"/>
    </style:style>
    <style:style style:name="P12" style:family="paragraph" style:parent-style-name="Standard">
      <style:paragraph-properties fo:margin-top="0.1665in" fo:margin-bottom="0in" loext:contextual-spacing="false" fo:line-height="100%" fo:text-align="justify" style:justify-single-word="false"/>
    </style:style>
    <style:style style:name="P13" style:family="paragraph" style:parent-style-name="Standard">
      <style:paragraph-properties fo:margin-top="0in" fo:margin-bottom="0.1665in" loext:contextual-spacing="false" fo:line-height="100%" fo:text-align="justify" style:justify-single-word="false"/>
    </style:style>
    <style:style style:name="P14" style:family="paragraph" style:parent-style-name="Standard">
      <style:paragraph-properties fo:margin-left="0.4165in" fo:margin-right="0.4165in" fo:margin-top="0.1665in" fo:margin-bottom="0.1665in" loext:contextual-spacing="false" fo:line-height="100%" fo:text-align="justify" style:justify-single-word="false" fo:text-indent="0in" style:auto-text-indent="false" fo:padding-left="0in" fo:padding-right="0.1528in" fo:padding-top="0in" fo:padding-bottom="0in" fo:border="none"/>
    </style:style>
    <style:style style:name="P15" style:family="paragraph" style:parent-style-name="Standard">
      <style:paragraph-properties fo:margin-top="0.1665in" fo:margin-bottom="0.1665in" loext:contextual-spacing="false" fo:line-height="100%" fo:text-align="justify" style:justify-single-word="false"/>
    </style:style>
    <style:style style:name="P16" style:family="paragraph" style:parent-style-name="Heading_20_4">
      <style:paragraph-properties fo:margin-top="0.1665in" fo:margin-bottom="0.028in" loext:contextual-spacing="false" fo:line-height="100%" fo:text-align="justify" style:justify-single-word="false" fo:keep-together="auto" fo:keep-with-next="auto"/>
    </style:style>
    <style:style style:name="P17" style:family="paragraph">
      <loext:graphic-properties draw:fill="solid" draw:fill-color="#a0a0a0"/>
      <style:paragraph-properties fo:text-align="center"/>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asian="Times New Roman1" style:font-name-complex="Times New Roman1" fo:background-color="#ffffff"/>
    </style:style>
    <style:style style:name="T3" style:family="text">
      <style:text-properties style:font-name="Times New Roman" fo:background-color="#e69138" loext:char-shading-value="0" style:font-name-asian="Times New Roman1" style:font-name-complex="Times New Roman1"/>
    </style:style>
    <style:style style:name="T4"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style:style>
    <style:style style:name="T5"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fo:background-color="#ffffff"/>
    </style:style>
    <style:style style:name="T6" style:family="text">
      <style:text-properties style:font-name="Times New Roman" fo:background-color="#9fc5e8" loext:char-shading-value="0"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weight="bold" style:font-name-asian="Times New Roman1" style:font-weight-asian="bold" style:font-name-complex="Times New Roman1" style:font-weight-complex="bold" fo:background-color="#00ffff"/>
    </style:style>
    <style:style style:name="T9" style:family="text">
      <style:text-properties style:font-name="Times New Roman" fo:font-weight="bold" style:font-name-asian="Times New Roman1" style:font-weight-asian="bold" style:font-name-complex="Times New Roman1" style:font-weight-complex="bold" fo:background-color="#ffffff"/>
    </style:style>
    <style:style style:name="T10" style:family="text">
      <style:text-properties style:font-name="Times New Roman" fo:font-weight="bold" fo:background-color="#ff9900" loext:char-shading-value="0" style:font-name-asian="Times New Roman1" style:font-weight-asian="bold" style:font-name-complex="Times New Roman1" style:font-weight-complex="bold"/>
    </style:style>
    <style:style style:name="T11" style:family="text">
      <style:text-properties style:font-name="Times New Roman" fo:background-color="#d0e0e3" loext:char-shading-value="0" style:font-name-asian="Times New Roman1" style:font-name-complex="Times New Roman1"/>
    </style:style>
    <style:style style:name="T12" style:family="text">
      <style:text-properties style:font-name="Times New Roman" fo:background-color="#9d7909" loext:char-shading-value="0" style:font-name-asian="Times New Roman1" style:font-name-complex="Times New Roman1"/>
    </style:style>
    <style:style style:name="T13" style:family="text">
      <style:text-properties style:font-name="Times New Roman" fo:background-color="#e6b8af" loext:char-shading-value="0" style:font-name-asian="Times New Roman1" style:font-name-complex="Times New Roman1"/>
    </style:style>
    <style:style style:name="T14" style:family="text">
      <style:text-properties style:font-name="Times New Roman" fo:background-color="#f4cccc" loext:char-shading-value="0" style:font-name-asian="Times New Roman1" style:font-name-complex="Times New Roman1"/>
    </style:style>
    <style:style style:name="T15" style:family="text">
      <style:text-properties style:font-name="Times New Roman" fo:background-color="#d5a6bd" loext:char-shading-value="0" style:font-name-asian="Times New Roman1" style:font-name-complex="Times New Roman1"/>
    </style:style>
    <style:style style:name="T16" style:family="text">
      <style:text-properties style:font-name="Times New Roman" fo:background-color="#d9ead3" loext:char-shading-value="0" style:font-name-asian="Times New Roman1" style:font-name-complex="Times New Roman1"/>
    </style:style>
    <style:style style:name="T17" style:family="text">
      <style:text-properties style:font-name="Times New Roman" fo:background-color="#b7b7b7" loext:char-shading-value="0" style:font-name-asian="Times New Roman1" style:font-name-complex="Times New Roman1"/>
    </style:style>
    <style:style style:name="T18" style:family="text">
      <style:text-properties style:font-name="Times New Roman" fo:background-color="#43cec3" loext:char-shading-value="0" style:font-name-asian="Times New Roman1" style:font-name-complex="Times New Roman1"/>
    </style:style>
    <style:style style:name="T19" style:family="text">
      <style:text-properties style:font-name="Times New Roman" fo:font-style="italic" style:text-underline-style="solid" style:text-underline-width="auto" style:text-underline-color="font-color" style:font-name-asian="Times New Roman1" style:font-style-asian="italic" style:font-name-complex="Times New Roman1" style:font-style-complex="italic"/>
    </style:style>
    <style:style style:name="T20" style:family="text">
      <style:text-properties style:font-name="Times New Roman" fo:background-color="#ffe599" loext:char-shading-value="0" style:font-name-asian="Times New Roman1" style:font-name-complex="Times New Roman1"/>
    </style:style>
    <style:style style:name="T21" style:family="text">
      <style:text-properties style:font-name="Times New Roman" fo:background-color="#93c47d" loext:char-shading-value="0" style:font-name-asian="Times New Roman1" style:font-name-complex="Times New Roman1"/>
    </style:style>
    <style:style style:name="T22" style:family="text">
      <style:text-properties style:font-name="Times New Roman" fo:font-size="12pt" style:font-name-asian="Times New Roman1" style:font-size-asian="12pt" style:font-name-complex="Times New Roman1" style:font-size-complex="12pt"/>
    </style:style>
    <style:style style:name="T2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4" style:family="text">
      <style:text-properties fo:color="#000000" style:font-name="Times New Roman" fo:font-size="11pt" fo:font-weight="bold" style:font-name-asian="Times New Roman1" style:font-size-asian="11pt" style:font-weight-asian="bold" style:font-name-complex="Times New Roman1" style:font-size-complex="11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tab/><text:tab/><text:tab/><text:tab/><text:tab/>EXP: Spent 247 / xp total 250 <text:s/>(150 starting, +43 disadvantages </text:span><text:span text:style-name="T3">50</text:span><text:span text:style-name="T1">xp Earned, +7 vows)<text:line-break/></text:span></text:p>
      <text:p text:style-name="P6"><text:span text:style-name="T1">Fire:<text:tab/></text:span><text:span text:style-name="T4">4</text:span><text:span text:style-name="T1"><text:tab/><text:tab/><text:tab/><text:tab/><text:tab/><text:tab/>Honor<text:tab/></text:span><text:span text:style-name="T4">1</text:span><text:span text:style-name="T1"> </text:span><text:span text:style-name="T6">(instead of adding 0.5*(1k1-5) <text:s/>subtract absolute value of that number.)</text:span></text:p>
      <text:p text:style-name="P6"><text:span text:style-name="T1">Water: </text:span><text:span text:style-name="T4">2</text:span><text:span text:style-name="T1"><text:tab/><text:tab/><text:tab/><text:tab/><text:tab/><text:tab/>Recognition </text:span><text:span text:style-name="T4">3.5 (halved from ‘low recognition’)</text:span></text:p>
      <text:p text:style-name="P6"><text:span text:style-name="T1">Air*:<text:tab/></text:span><text:span text:style-name="T4">4</text:span><text:span text:style-name="T7"><text:tab/></text:span><text:span text:style-name="T1"><text:tab/><text:tab/><text:tab/><text:tab/><text:tab/>Rank<text:tab/>‘</text:span><text:span text:style-name="T4">7’</text:span><text:span text:style-name="T7"> 3rd seat Steward</text:span></text:p>
      <text:p text:style-name="P6"><text:span text:style-name="T1">Earth:<text:tab/> </text:span><text:span text:style-name="T4">3</text:span><text:span text:style-name="T1"> <text:tab/><text:tab/><text:tab/><text:tab/><text:tab/><text:tab/>Wound Check: 4k2</text:span><text:span text:style-name="T8">+5 </text:span><text:span text:style-name="T11">3Dan</text:span><text:span text:style-name="T1"> </text:span><text:span text:style-name="T12">(</text:span><text:span text:style-name="T1">SotE &amp;(</text:span><text:span text:style-name="T12">+1k0 included)</text:span></text:p>
      <text:p text:style-name="P6"><text:span text:style-name="T1">Void: <text:tab/></text:span><text:span text:style-name="T4">4</text:span><text:span text:style-name="T1"><text:tab/><text:tab/><text:tab/><text:tab/><text:tab/><text:tab/>vp available: <text:s/>2 of 2</text:span></text:p>
      <text:p text:style-name="P9"><text:span text:style-name="T1"><text:tab/><text:tab/>Light wounds:<text:tab/><text:tab/><text:tab/><text:tab/><text:tab/><text:tab/><text:tab/><text:tab/><text:tab/><text:tab/><text:tab/><text:tab/>Serious wounds:<text:tab/>0 out of 5 (permanent wound)<text:line-break/><text:tab/><text:tab/><text:tab/>Last heal morning of th() /vp at 2 on #th<text:line-break/>Damage: 9k2 for katana, 8k2 for spears and wakizashi, 7k2 for knives and other small weapons, <text:s/>8k2 for a monk staff, and 5k3 for unarmed fighting. From </text:span><text:span text:style-name="T12">+1k0 on damage rolls, +1k1 for unarmed attacks<text:line-break/></text:span><text:span text:style-name="T14">Failed parry attempts do not lower your rolled damage dice</text:span><text:span text:style-name="T1">!</text:span><text:span text:style-name="T12"><text:line-break/></text:span><text:span text:style-name="T2"><text:tab/><text:tab/><text:tab/><text:tab/></text:span><text:span text:style-name="T1">Attack:<text:tab/></text:span><text:span text:style-name="T4">4</text:span><text:span text:style-name="T2"> <text:s/>9k4</text:span><text:span text:style-name="T8">+5</text:span><text:span text:style-name="T1"> </text:span><text:span text:style-name="T11">3Dan</text:span><text:span text:style-name="T2"> (</text:span><text:span text:style-name="T12">+1k0 included)<text:line-break/></text:span><text:span text:style-name="T2"><text:tab/><text:tab/><text:tab/><text:tab/></text:span><text:span text:style-name="T1">Parry:<text:tab/></text:span><text:span text:style-name="T4">5</text:span><text:span text:style-name="T7"> </text:span><text:span text:style-name="T1"><text:line-break/>3rd Dan Adventure points: </text:span><text:span text:style-name="T11">0 of <text:s/>8</text:span><text:span text:style-name="T2"> <text:line-break/></text:span><text:span text:style-name="T1">These free raises may also be applied to action dice at any time, lowering a single die by 5 phases.<text:line-break/><text:tab/> </text:span></text:p>
      <text:p text:style-name="P4"><text:span text:style-name="T7">Conviction</text:span><text:span text:style-name="T1"> </text:span><text:span text:style-name="T4">4</text:span><text:span text:style-name="T1"> You receive 2X points per day, where X is equal to the rank of this knack. After you make any roll, you may spend up to X of these points to raise the roll by the number of points spent. </text:span><text:span text:style-name="T15">0 of 10</text:span></text:p>
      <text:p text:style-name="P1"><text:span text:style-name="T7">Otherworldliness</text:span><text:span text:style-name="T1"> </text:span><text:span text:style-name="T4">4</text:span><text:span text:style-name="T1"> When rolling a basic skill, you may increase the skill's rank by one, to a maximum of five. This may be done multiple times on the same roll, but only a number of times per adventure equal to twice your rank in this knack. </text:span><text:span text:style-name="T15">0 of 8</text:span></text:p>
      <text:p text:style-name="P2"><text:span text:style-name="T9">Worldliness</text:span><text:span text:style-name="T2"> </text:span><text:span text:style-name="T5">4</text:span><text:span text:style-name="T2"> Each adventure, you may spend a number of extra void points equal to the rank of this knack. </text:span><text:span text:style-name="T15">0 of 4</text:span></text:p>
      <text:p text:style-name="P10"><text:span text:style-name="T2"><text:tab/></text:span><text:span text:style-name="T1"><text:tab/><text:tab/><text:tab/><text:tab/></text:span><text:span text:style-name="T7"> <text:s/></text:span></text:p>
      <text:p text:style-name="P6"><draw:rect text:anchor-type="as-char" style:rel-width="100%" draw:z-index="0" draw:style-name="gr1" draw:text-style-name="P17" svg:width="0.0012in" svg:height="0.0213in"><text:p/></draw:rect></text:p>
      <text:p text:style-name="P7"/>
      <text:p text:style-name="P11"><text:span text:style-name="T17">Acting</text:span><text:span text:style-name="T2"> </text:span><text:span text:style-name="T5">3</text:span><text:span text:style-name="T2"> </text:span><text:span text:style-name="T1">(sincerity, intimidation, and sneaking)<text:tab/><text:tab/></text:span><text:span text:style-name="T18">Commerce</text:span><text:span text:style-name="T2"> </text:span><text:span text:style-name="T5">1</text:span><text:span text:style-name="T2"> </text:span><text:span text:style-name="T8">+5</text:span></text:p>
      <text:p text:style-name="P8"><text:span text:style-name="T1"><text:tab/><text:tab/><text:tab/></text:span></text:p>
      <text:p text:style-name="P11"><text:span text:style-name="T17">Interrogation</text:span><text:span text:style-name="T1"> <text:s/></text:span><text:span text:style-name="T4">0</text:span><text:span text:style-name="T1"><text:tab/><text:tab/><text:tab/><text:tab/><text:tab/><text:tab/></text:span><text:span text:style-name="T18">History</text:span><text:span text:style-name="T2"> </text:span><text:span text:style-name="T5">0</text:span><text:span text:style-name="T2"> </text:span><text:span text:style-name="T1">(raise on culture, law, strategy </text:span><text:span text:style-name="T2">&amp; heraldry up to 25</text:span><text:span text:style-name="T1">)<text:line-break/><text:tab/><text:tab/></text:span></text:p>
      <text:p text:style-name="P11"><text:span text:style-name="T17">Manipulation</text:span><text:span text:style-name="T2"> </text:span><text:span text:style-name="T5">0</text:span><text:span text:style-name="T2"><text:tab/><text:tab/><text:tab/></text:span><text:span text:style-name="T1"><text:tab/><text:tab/><text:tab/></text:span><text:span text:style-name="T18">Underworld</text:span><text:span text:style-name="T2"> </text:span><text:span text:style-name="T4">0</text:span><text:span text:style-name="T1"> </text:span><text:span text:style-name="T8">+5</text:span></text:p>
      <text:p text:style-name="P8"><draw:rect text:anchor-type="as-char" style:rel-width="100%" draw:z-index="1" draw:style-name="gr1" draw:text-style-name="P17" svg:width="0.0012in" svg:height="0.0213in"><text:p/></draw:rect></text:p>
      <text:p text:style-name="P8"><text:span text:style-name="T1"><text:tab/><text:tab/><text:tab/></text:span></text:p>
      <text:p text:style-name="P6"><text:span text:style-name="T17">Bragging</text:span><text:span text:style-name="T1"> </text:span><text:span text:style-name="T4">0</text:span><text:span text:style-name="T1"> </text:span><text:span text:style-name="T8">+5</text:span><text:span text:style-name="T1"> </text:span><text:span text:style-name="T20">with Hayato</text:span><text:span text:style-name="T1"> </text:span><text:span text:style-name="T2">(</text:span><text:span text:style-name="T6">H+Rec</text:span><text:span text:style-name="T2">.+x2 diff to^)</text:span><text:span text:style-name="T1"><text:tab/> <text:tab/></text:span><text:span text:style-name="T18">Culture</text:span><text:span text:style-name="T2"> </text:span><text:span text:style-name="T5">0</text:span><text:span text:style-name="T2"> (</text:span><text:span text:style-name="T14">-</text:span><text:span text:style-name="T2">10 net)</text:span></text:p>
      <text:p text:style-name="P8"><text:span text:style-name="T1"><text:tab/><text:tab/><text:tab/></text:span></text:p>
      <text:p text:style-name="P6"><text:span text:style-name="T17">Etiquette</text:span><text:span text:style-name="T2"> </text:span><text:span text:style-name="T5">0</text:span><text:span text:style-name="T1"> <text:tab/><text:tab/><text:tab/><text:tab/><text:tab/><text:tab/><text:tab/></text:span><text:span text:style-name="T18">Heraldry</text:span><text:span text:style-name="T2"> </text:span><text:span text:style-name="T5">0</text:span><text:span text:style-name="T2"> +0 up to 25<text:line-break/></text:span><text:span text:style-name="T1"><text:tab/><text:tab/><text:tab/></text:span></text:p>
      <text:p text:style-name="P6"><text:span text:style-name="T17">Intimidation</text:span><text:span text:style-name="T2"> </text:span><text:span text:style-name="T5">0</text:span><text:span text:style-name="T2"> </text:span><text:span text:style-name="T8">+15</text:span><text:span text:style-name="T2"> <text:s text:c="2"/><text:tab/><text:tab/></text:span><text:span text:style-name="T1"><text:tab/><text:tab/><text:tab/><text:tab/></text:span><text:span text:style-name="T18">Investigation</text:span><text:span text:style-name="T1"> </text:span><text:span text:style-name="T4">0</text:span></text:p>
      <text:p text:style-name="P8"><text:span text:style-name="T1"><text:tab/><text:tab/><text:tab/></text:span></text:p>
      <text:p text:style-name="P6"><text:span text:style-name="T17">Sincerity</text:span><text:span text:style-name="T2"> </text:span><text:span text:style-name="T5">2</text:span><text:span text:style-name="T2"> </text:span><text:span text:style-name="T8">+15</text:span><text:span text:style-name="T2"> &amp; </text:span><text:span text:style-name="T8">+5</text:span><text:span text:style-name="T1"> </text:span><text:span text:style-name="T20">with Hayato</text:span><text:span text:style-name="T1"> &amp; </text:span><text:span text:style-name="T2">(+H x2 if open)<text:tab/><text:tab/></text:span><text:span text:style-name="T18">Law</text:span><text:span text:style-name="T2"> </text:span><text:span text:style-name="T5">0</text:span><text:span text:style-name="T2"> +0 <text:s/></text:span><text:span text:style-name="T11">3Dan</text:span></text:p>
      <text:p text:style-name="P8"><text:soft-page-break/><text:span text:style-name="T1"><text:tab/><text:tab/><text:tab/></text:span></text:p>
      <text:p text:style-name="P6"><text:span text:style-name="T17">Sneaking</text:span><text:span text:style-name="T2"> </text:span><text:span text:style-name="T5">3</text:span><text:span text:style-name="T2"> </text:span><text:span text:style-name="T8">+15</text:span><text:span text:style-name="T2"><text:tab/></text:span><text:span text:style-name="T1"><text:tab/><text:tab/><text:tab/><text:tab/><text:tab/></text:span><text:span text:style-name="T18">Precepts</text:span><text:span text:style-name="T2"> </text:span><text:span text:style-name="T5">4</text:span><text:span text:style-name="T2"> </text:span><text:span text:style-name="T8">+5</text:span><text:span text:style-name="T7"> </text:span><text:span text:style-name="T20">with Hayato</text:span><text:span text:style-name="T1"> </text:span><text:span text:style-name="T11">3Dan</text:span></text:p>
      <text:p text:style-name="P8"><text:span text:style-name="T1"><text:tab/><text:tab/><text:tab/></text:span></text:p>
      <text:p text:style-name="P6"><text:span text:style-name="T17">Tact</text:span><text:span text:style-name="T2"> </text:span><text:span text:style-name="T5">1</text:span><text:span text:style-name="T2"> </text:span><text:span text:style-name="T11">3Dan</text:span><text:span text:style-name="T2"> <text:tab/><text:tab/><text:tab/><text:tab/><text:tab/><text:tab/></text:span><text:span text:style-name="T1"><text:tab/></text:span><text:span text:style-name="T18">Strategy</text:span><text:span text:style-name="T2"> </text:span><text:span text:style-name="T5">0</text:span><text:span text:style-name="T2"> +0</text:span><text:span text:style-name="T18"><text:line-break/><text:line-break/><text:line-break/></text:span><text:span text:style-name="T20">With Hayato</text:span><text:span text:style-name="T1">, get a free raise on all contested rolls for which your opponent has an equal or higher skill rank<text:line-break/></text:span><draw:rect text:anchor-type="as-char" style:rel-width="100%" draw:z-index="2" draw:style-name="gr1" draw:text-style-name="P17" svg:width="0.0012in" svg:height="0.0213in"><text:p/></draw:rect></text:p>
      <text:p text:style-name="P1"><text:span text:style-name="T23"><text:line-break/><text:line-break/><text:tab/><text:tab/><text:tab/><text:tab/><text:tab/><text:tab/><text:line-break/><text:tab/><text:tab/><text:tab/><text:tab/><text:tab/><text:tab/>Brotherhood of Shinsei Monk School</text:span></text:p>
      <text:p text:style-name="P12"><text:span text:style-name="T23"><text:line-break/></text:span></text:p>
      <text:p text:style-name="P12"><text:span text:style-name="T1"><text:tab/>Since before the dawn of history, pious men and women have banded together to walk the path of enlightenment. They live with one foot in the world and the other outside it, learning to act according to the Tao, which is the way of all things. Long before the Great Ancestors brought civilization to the world, they defended their fellow man from the cruel and brutal warlords of that age. The Hantei perceived the special place occupied by those who take up such a life, designating them outside the Celestial Order which defines society; monks in the Brotherhood are neither people nor half-people nor non-people, but are instead a category of their own. To this day the braver of them continue to protect the peasantry from thieves and bandits, but braver still are those willing to stand up to their samurai rulers and challenge those among them who fail to act righteously.</text:span></text:p>
      <text:p text:style-name="P12"><text:span text:style-name="T1"><text:tab/></text:span></text:p>
      <text:p text:style-name="P12"><text:span text:style-name="T1"><text:line-break/></text:span></text:p>
      <text:p text:style-name="P12"><text:span text:style-name="T7">School Ring: </text:span><text:span text:style-name="T1">Any non-Void</text:span></text:p>
      <text:p text:style-name="P12"><text:span text:style-name="T7">School Knacks: </text:span><text:span text:style-name="T1">conviction, otherworldliness, worldliness</text:span></text:p>
      <text:p text:style-name="P12"><text:span text:style-name="T7">Special Ability: </text:span><text:span text:style-name="T1">You keep one extra die for damage rolls from unarmed attacks.</text:span></text:p>
      <text:p text:style-name="P12"><text:span text:style-name="T7">First Dan: </text:span><text:span text:style-name="T1">Roll one extra die on attack, damage, and wound check rolls.</text:span></text:p>
      <text:p text:style-name="P12"><text:span text:style-name="T7">Second Dan: </text:span><text:span text:style-name="T1">You get a free raise on all attack rolls.</text:span></text:p>
      <text:p text:style-name="P12"><text:span text:style-name="T7">Third Dan: </text:span><text:span text:style-name="T1">Each adventure you get 2X free raises, where X is equal to your precepts skill, which may be applied to the following rolls: history, law, precepts, tact, and attack. You may not spend more than X of these free raises on a single roll. These free raises may also be applied to action dice at any time, lowering a single die by 5 phases.</text:span></text:p>
      <text:p text:style-name="P12"><text:span text:style-name="T7">Fourth Dan: </text:span><text:span text:style-name="T1">Raise your current and maximum rank in a non-Void ring of your choice by 1. Raising this Ring now costs 5 fewer XP.<text:line-break/>Failed parry attempts do not lower your rolled damage dice.</text:span></text:p>
      <text:p text:style-name="P12"><text:span text:style-name="T7">Fifth Dan: </text:span><text:span text:style-name="T1">Once per round after you have been attacked but before damage is rolled, you may spend an action die from any phase to attack your attacker. If your attack roll is at least as high as your attacker's then the attack against you is canceled; your attack continues and you hit/miss and roll damage as normal.</text:span></text:p>
      <text:p text:style-name="P13"><text:span text:style-name="T7"><text:line-break/><text:line-break/><text:line-break/>Suro: all 3 phases<text:line-break/>Mechanics:<text:line-break/></text:span><text:span text:style-name="T1"> Once per set of potential watchers/observers make a Between Place roll and bank your successes:</text:span></text:p>
      <text:p text:style-name="P14"><text:span text:style-name="T1">air only: difficulty (10 + highest opposing investigation) sneaking + void</text:span></text:p>
      <text:p text:style-name="P15"><text:span text:style-name="T1">Each ability may be activated by spending 1 success. Each activated ability may be used until you and/or everyone who could potentially observe you has moved such that it is no longer possible to be observed by any of them.</text:span></text:p>
      <text:p text:style-name="P16"><text:bookmark text:name="_fhlu2mglze07"/><text:span text:style-name="T24">Crescent Moon</text:span></text:p>
      <text:p text:style-name="P15"><text:span text:style-name="T7">Nightwalker’s Grace:<text:line-break/></text:span><text:span text:style-name="T1"> Disciples of Suro are masters of stealth, and this technique grants the equivalent of a 100 sneaking roll against all passive observers.</text:span></text:p>
      <text:p text:style-name="P16"><text:bookmark text:name="_ijk22gp910nl"/><text:span text:style-name="T24">Half Moon</text:span></text:p>
      <text:p text:style-name="P15"><text:span text:style-name="T7">Nighttime Entry:<text:line-break/></text:span><text:span text:style-name="T1"> Disciples of Suro are the masters of thievery who can open any lock with ease. Activate this ability to unlock, unbar, unlatch, or otherwise open any door, window, chest, etc.</text:span></text:p>
      <text:p text:style-name="P15"><text:span text:style-name="T7">Veil of Shadows:<text:line-break/></text:span><text:span text:style-name="T1"> By standing perfectly still in a shadow, you may become impossible to see, entering the shadow and becoming part of it. Activate this ability to become invisible to all observers while standing outside of direct sunlight or moonlight.</text:span></text:p>
      <text:p text:style-name="P15"><text:span text:style-name="T7">Grasp the Darkness:<text:line-break/></text:span><text:span text:style-name="T1"> A hallmark of the Disciples of Suro’s mastery of infiltration, you have gained the ability to manipulate shadows and darkness to climb or even stand on any darkened surface.</text:span></text:p>
      <text:p text:style-name="P16"><text:bookmark text:name="_pmxqfwm8k2gt"/><text:soft-page-break/><text:span text:style-name="T24">Gibbous Moon</text:span></text:p>
      <text:p text:style-name="P15"><text:span text:style-name="T7">Obscurity of the Herd:<text:line-break/></text:span><text:span text:style-name="T1"> You can lose yourself in a crowd so instantly and completely that someone watching you would instantly lose track of you. Additionally, even when traveling in a small group of at least 4, you can go unnoticed and unremembered.</text:span></text:p>
      <text:p text:style-name="P15"><text:span text:style-name="T7">Shadowy Cache:<text:line-break/></text:span><text:span text:style-name="T1"> Your expertise in the art of concealment allows you to stash away any object on your person, making it undetectable even if you are searched.</text:span></text:p>
      <text:p text:style-name="P15"><text:span text:style-name="T7">Shadowstep:<text:line-break/></text:span><text:span text:style-name="T1"> Disciples of Suro possess an uncanny ability to move between shadows unnoticed, disappearing from one shadow and reappearing in another as if they were never there. The space between the two shadows may flicker and move, but you remain unseen as they travel undetected through the shadows.</text:span></text:p>
      <text:p text:style-name="P12"><text:span text:style-name="T1"><text:line-break/><text:line-break/></text:span><text:span text:style-name="T7">Strength of the Earth</text:span><text:span text:style-name="T1"> (8): You get a free raise on wound checks.<text:line-break/><text:line-break/></text:span><text:span text:style-name="T7">Quick Healer </text:span><text:span text:style-name="T1">(3):</text:span><text:span text:style-name="T7"> </text:span><text:span text:style-name="T1">You heal two serious wounds instead of one the first night after being wounded.<text:line-break/><text:line-break/></text:span><text:span text:style-name="T7">Worldly</text:span><text:span text:style-name="T1"> (4): You get a free raise on commerce and underworld rolls.<text:line-break/><text:line-break/></text:span><text:span text:style-name="T7">Steward</text:span><text:span text:style-name="T1"> (6):</text:span><text:span text:style-name="T7"> </text:span><text:span text:style-name="T1">You oversee all operations for some core area of temple work. Perhaps you are in charge of the education of temple recruits, or you are the head of the temple’s libraries and archives, or maybe you manage all temple maintenance and renovations. In addition to the significant additional standing that comes with this position, you are assumed to have 50 koku in discretionary money to spend per year, plus an additional 50 koku per point of commerce and other commerce bonuses you have. <text:line-break/><text:line-break/><text:line-break/></text:span></text:p>
      <text:p text:style-name="P2"><text:span text:style-name="T7">Driven+1</text:span><text:span text:style-name="T1"> (6): </text:span><text:span text:style-name="T7">Merchant ties</text:span><text:span text:style-name="T1"> - You have some ultimate goal which you want to achieve so badly that you'll disregard the adventure goal in order to pursue it.</text:span></text:p>
      <text:p text:style-name="P2"><text:span text:style-name="T7"><text:line-break/>Contrary </text:span><text:span text:style-name="T1">(5): You cannot remain a neutral third party in any disagreement; you must actively take a side.<text:line-break/><text:line-break/></text:span><text:span text:style-name="T7">Humble</text:span><text:span text:style-name="T1"> (2): Bragging rolls about your accomplishments are unaffected by this disadvantage, as are the Rank and Recognition bonuses you receive for them. However, while you may speak well of your accomplishments, you are self-deprecating about your skills and talents. Rokugan considers humility a vice, or at least an unfortunate eccentricity, so this will be frowned upon by many.</text:span></text:p>
      <text:p text:style-name="P2"><text:span text:style-name="T1"><text:line-break/></text:span><text:span text:style-name="T7">Long Temper</text:span><text:span text:style-name="T1"> (5): You hold grudges over perceived insults, especially over matters of honor. Although you need not react immediately, you will not forget the insult and will burn with the need to extract payback.<text:line-break/></text:span></text:p>
      <text:p text:style-name="P2"><text:span text:style-name="T7">Meddler</text:span><text:span text:style-name="T1"> (2): You want to know everything that's going on and investigate every interesting event around. Any intriguing goings on simply have to be looked into, no matter how sensitive the issue.<text:line-break/><text:line-break/></text:span><text:span text:style-name="T7">Permanent Wound </text:span><text:span text:style-name="T1">(12):</text:span><text:span text:style-name="T7"> Cirrhosis of internal organs due to toxic substances.</text:span><text:span text:style-name="T1"> It takes one fewer serious wound to kill you. You may not take the Great Destiny advantage.</text:span></text:p>
      <text:p text:style-name="P2"><text:span text:style-name="T7"><text:line-break/>Unconventional</text:span><text:span text:style-name="T1"> (4): You have a slightly unusual way of approaching some aspect of bushido which can sometimes make you seem less honorable than you are at first. Whenever someone uses the discern Honor knack on you, instead of adding 0.5 * (1k1 - 5) to your honor, the GM subtracts the absolute value of that number. This may not be taken with the Virtue advantage.</text:span></text:p>
      <text:p text:style-name="P12"><text:span text:style-name="T7">Unkempt</text:span><text:span text:style-name="T1"> (4): You are less diligent about cleanliness and grooming than is considered proper. As a result, some characters will view you as uncivilized or undisciplined, and you get a -10 penalty to all culture rolls. This may not be taken with Vain.</text:span></text:p>
      <text:p text:style-name="P2"><text:span text:style-name="T7"><text:line-break/>Low Recognition</text:span><text:span text:style-name="T1"> (3): You may choose to cut your starting Recognition in half to gain an additional 3 XP</text:span></text:p>
      <text:p text:style-name="P3"/>
      <text:p text:style-name="P12"><text:span text:style-name="T1"><text:line-break/>+3 from Patrick’s 6 vow of consumption<text:line-break/>+2 from Patrick’s 4 vow of Poverty<text:line-break/><text:line-break/>+2 from Marshall’s 4 vow of Poverty</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in" fo:margin-right="0in"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3" meta:word-count="1543" meta:character-count="8967" meta:non-whitespace-character-count="7280"/>
    <meta:generator>LibreOfficeDev/6.0.5.2$Linux_X86_64 LibreOffice_project/</meta:generator>
  </office:meta>
</office:document-meta>
</file>